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4000001085C8FE9E2.png" manifest:media-type="image/png"/>
  <manifest:file-entry manifest:full-path="Pictures/1000000000000780000002D072DE48C5.png" manifest:media-type="image/png"/>
  <manifest:file-entry manifest:full-path="Pictures/10000000000007800000032BBB88E88D.png" manifest:media-type="image/png"/>
  <manifest:file-entry manifest:full-path="Pictures/1000000100000774000001174410F3B8.png" manifest:media-type="image/png"/>
  <manifest:file-entry manifest:full-path="Pictures/10000000000007720000038658EF5B8F.png" manifest:media-type="image/png"/>
  <manifest:file-entry manifest:full-path="Pictures/100000000000077500000399188AE50A.png" manifest:media-type="image/png"/>
  <manifest:file-entry manifest:full-path="Pictures/1000000000000772000003894B9465F7.png" manifest:media-type="image/png"/>
  <manifest:file-entry manifest:full-path="Pictures/1000000000000774000003889B62C1C5.png" manifest:media-type="image/png"/>
  <manifest:file-entry manifest:full-path="Pictures/10000000000007770000038649AE68BD.png" manifest:media-type="image/png"/>
  <manifest:file-entry manifest:full-path="Pictures/10000000000007800000023A70DBFACB.png" manifest:media-type="image/png"/>
  <manifest:file-entry manifest:full-path="Pictures/100000000000077F000001E12C96E7A0.png" manifest:media-type="image/png"/>
  <manifest:file-entry manifest:full-path="Pictures/100000000000076D000003852B782CC0.png" manifest:media-type="image/png"/>
  <manifest:file-entry manifest:full-path="Pictures/10000000000006790000016273D9DDE3.png" manifest:media-type="image/png"/>
  <manifest:file-entry manifest:full-path="Pictures/10000000000007770000025C7A620E49.png" manifest:media-type="image/png"/>
  <manifest:file-entry manifest:full-path="Pictures/1000000000000769000003409DB3BEFB.png" manifest:media-type="image/png"/>
  <manifest:file-entry manifest:full-path="Pictures/100000000000076F0000033E7A03CE2D.png" manifest:media-type="image/png"/>
  <manifest:file-entry manifest:full-path="Pictures/100000000000071200000201351AE94E.png" manifest:media-type="image/png"/>
  <manifest:file-entry manifest:full-path="Pictures/100000000000076A00000382D132734D.png" manifest:media-type="image/png"/>
  <manifest:file-entry manifest:full-path="Pictures/1000000000000780000002E1D396CAB3.png" manifest:media-type="image/png"/>
  <manifest:file-entry manifest:full-path="Pictures/100000010000076F0000015530FC65EE.png" manifest:media-type="image/png"/>
  <manifest:file-entry manifest:full-path="Pictures/10000000000005D00000011AE251F17B.png" manifest:media-type="image/png"/>
  <manifest:file-entry manifest:full-path="Pictures/10000000000007800000033D33791275.png" manifest:media-type="image/png"/>
  <manifest:file-entry manifest:full-path="Pictures/10000000000007710000037A608375F8.png" manifest:media-type="image/png"/>
  <manifest:file-entry manifest:full-path="Pictures/10000000000006FF000002D49B4FD5FE.png" manifest:media-type="image/png"/>
  <manifest:file-entry manifest:full-path="Pictures/10000001000007740000017C012F57B6.png" manifest:media-type="image/png"/>
  <manifest:file-entry manifest:full-path="Pictures/10000000000007800000039D9D822F9F.png" manifest:media-type="image/png"/>
  <manifest:file-entry manifest:full-path="Pictures/10000000000007620000022B734A5EF1.png" manifest:media-type="image/png"/>
  <manifest:file-entry manifest:full-path="Pictures/100000000000048F000000E8B3A05252.png" manifest:media-type="image/png"/>
  <manifest:file-entry manifest:full-path="Pictures/100000000000077D000000CAF8D894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aden Sans" svg:font-family="'Almaden Sans', Helvetica, 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List_20_Paragraph" style:list-style-name="WWNum16">
      <style:paragraph-properties fo:margin-left="0in" fo:line-height="100%" fo:text-indent="0in" style:auto-text-indent="false" fo:padding="0in" fo:border="none" style:shadow="none" style:join-border="false"/>
      <style:text-properties officeooo:paragraph-rsid="0012ec4f"/>
    </style:style>
    <style:style style:name="P3" style:family="paragraph" style:parent-style-name="List_20_Paragraph">
      <style:paragraph-properties fo:margin-left="0in" fo:line-height="100%" fo:text-indent="0in" style:auto-text-indent="false" fo:padding="0in" fo:border="none"/>
    </style:style>
    <style:style style:name="P4" style:family="paragraph" style:parent-style-name="Standard">
      <style:paragraph-properties fo:text-align="start" style:justify-single-word="false"/>
      <style:text-properties officeooo:rsid="000e171e" officeooo:paragraph-rsid="000e171e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b8bdd" officeooo:paragraph-rsid="000b8bd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fo:font-weight="bold" officeooo:paragraph-rsid="0012ec4f" style:font-weight-asian="bold" style:font-weight-complex="bold"/>
    </style:style>
    <style:style style:name="P7" style:family="paragraph" style:parent-style-name="Standard">
      <style:paragraph-properties fo:margin-left="-0.0984in" fo:line-height="100%" fo:padding="0in" fo:border="none" style:shadow="none" style:join-border="false"/>
      <style:text-properties fo:font-weight="bold" officeooo:paragraph-rsid="0012ec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2ec4f" officeooo:paragraph-rsid="0012ec4f"/>
    </style:style>
    <style:style style:name="P9" style:family="paragraph" style:parent-style-name="Standard">
      <style:paragraph-properties fo:text-align="start" style:justify-single-word="false"/>
      <style:text-properties officeooo:rsid="0012ec4f" officeooo:paragraph-rsid="000e171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0b8bdd"/>
    </style:style>
    <style:style style:name="P12" style:family="paragraph" style:parent-style-name="Standard">
      <style:paragraph-properties fo:text-align="start" style:justify-single-word="false"/>
      <style:text-properties officeooo:rsid="000c4679" officeooo:paragraph-rsid="000c4679"/>
    </style:style>
    <style:style style:name="P13" style:family="paragraph" style:parent-style-name="Standard">
      <style:paragraph-properties fo:text-align="start" style:justify-single-word="false"/>
      <style:text-properties officeooo:rsid="000c4679" officeooo:paragraph-rsid="000e171e"/>
    </style:style>
    <style:style style:name="P14" style:family="paragraph" style:parent-style-name="Standard">
      <style:paragraph-properties fo:text-align="start" style:justify-single-word="false"/>
      <style:text-properties officeooo:rsid="000c4679" officeooo:paragraph-rsid="000e7d8d"/>
    </style:style>
    <style:style style:name="P15" style:family="paragraph" style:parent-style-name="Standard">
      <style:paragraph-properties fo:text-align="start" style:justify-single-word="false"/>
      <style:text-properties officeooo:rsid="000c4679" officeooo:paragraph-rsid="0012ec4f"/>
    </style:style>
    <style:style style:name="P16" style:family="paragraph" style:parent-style-name="Standard">
      <style:paragraph-properties fo:text-align="start" style:justify-single-word="false"/>
      <style:text-properties officeooo:rsid="001030aa" officeooo:paragraph-rsid="001030aa"/>
    </style:style>
    <style:style style:name="P17" style:family="paragraph" style:parent-style-name="Standard">
      <style:paragraph-properties fo:margin-left="-0.0984in" fo:line-height="100%" fo:padding="0in" fo:border="none" style:shadow="none" style:join-border="false"/>
      <style:text-properties officeooo:paragraph-rsid="0012ec4f"/>
    </style:style>
    <style:style style:name="P18" style:family="paragraph" style:parent-style-name="Standard">
      <style:paragraph-properties fo:text-align="start" style:justify-single-word="false"/>
      <style:text-properties officeooo:rsid="001307f3" officeooo:paragraph-rsid="001307f3"/>
    </style:style>
    <style:style style:name="P19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officeooo:rsid="0012ec4f" officeooo:paragraph-rsid="0012ec4f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20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bold" officeooo:paragraph-rsid="0012ec4f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Standard">
      <style:paragraph-properties fo:text-align="start" style:justify-single-word="false"/>
      <style:text-properties fo:color="#404040" loext:opacity="100%" style:font-name="Calibri" fo:font-size="12pt" fo:font-weight="bold" officeooo:paragraph-rsid="000b8bd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2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bold" officeooo:paragraph-rsid="0012ec4f" fo:background-color="#ffff00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3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normal" officeooo:paragraph-rsid="0012ec4f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24" style:family="paragraph" style:parent-style-name="Standard">
      <style:paragraph-properties fo:text-align="start" style:justify-single-word="false"/>
      <style:text-properties fo:color="#404040" loext:opacity="100%" style:font-name="Calibri" fo:font-size="12pt" fo:font-weight="normal" officeooo:paragraph-rsid="000b8bdd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25" style:family="paragraph" style:parent-style-name="Text_20_body">
      <style:paragraph-properties fo:text-align="start" style:justify-single-word="false"/>
      <style:text-properties officeooo:paragraph-rsid="000c4679"/>
    </style:style>
    <style:style style:name="P26" style:family="paragraph" style:parent-style-name="Text_20_body">
      <style:paragraph-properties fo:text-align="start" style:justify-single-word="false"/>
      <style:text-properties officeooo:rsid="000c4679" officeooo:paragraph-rsid="000c4679"/>
    </style:style>
    <style:style style:name="T1" style:family="text">
      <style:text-properties fo:color="#404040" loext:opacity="100%" style:font-name="Calibri" fo:font-size="18pt" officeooo:rsid="0012ec4f" style:font-name-asian="Calibri1" style:font-size-asian="18pt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8pt" officeooo:rsid="0014e185" style:font-name-asian="Calibri1" style:font-size-asian="18pt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4pt" officeooo:rsid="0012ec4f" style:font-name-asian="Calibri1" style:font-size-asian="14pt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officeooo:rsid="0012ec4f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fo:font-weight="normal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2pt" fo:font-weight="normal" officeooo:rsid="00143cda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2pt" fo:font-weight="normal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2pt" fo:font-weight="normal" fo:background-color="#ffff00" loext:char-shading-value="0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2pt" fo:font-weight="normal" fo:background-color="#ffff00" loext:char-shading-value="0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2pt" fo:font-weight="normal" fo:background-color="transparent" loext:char-shading-value="0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style:font-name="Calibri" fo:font-size="12pt" fo:font-weight="normal" fo:background-color="transparent" loext:char-shading-value="0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officeooo:rsid="0012ec4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fo:font-weight="normal" officeooo:rsid="0012ec4f" style:font-size-asian="12pt" style:font-weight-asian="normal" style:font-size-complex="12pt" style:font-weight-complex="normal"/>
    </style:style>
    <style:style style:name="T17" style:family="text">
      <style:text-properties officeooo:rsid="000c4679"/>
    </style:style>
    <style:style style:name="T18" style:family="text">
      <style:text-properties officeooo:rsid="001307f3"/>
    </style:style>
    <style:style style:name="T19" style:family="text">
      <style:text-properties officeooo:rsid="00143cda"/>
    </style:style>
    <style:style style:name="T20" style:family="text">
      <style:text-properties fo:font-size="10.5pt" fo:font-weight="normal" officeooo:rsid="0012ec4f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143cda" style:font-size-asian="10.5pt" style:font-weight-asian="normal" style:font-size-complex="10.5pt" style:font-weight-complex="normal"/>
    </style:style>
    <style:style style:name="T2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.6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2.78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2.00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2.129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8. </text:span><text:span text:style-name="T1">Master Slave Architecture</text:span></text:p>
      <text:p text:style-name="P7"><text:span text:style-name="T4">Step 1: </text:span><text:span text:style-name="T5">Create Agents/Slave</text:span></text:p>
      <text:p text:style-name="P17"><text:span text:style-name="T3"/></text:p>
      <text:p text:style-name="P19">1.1 Make 2 folders as Agent1 and Agent2 in the directory.</text:p>
      <text:p text:style-name="P5"><draw:frame draw:style-name="fr1" draw:name="Image1" text:anchor-type="as-char" svg:width="6.6929in" svg:height="1.2791in" draw:z-index="0"><draw:image xlink:href="Pictures/10000000000006790000016273D9DDE3.png" xlink:type="simple" xlink:show="embed" xlink:actuate="onLoad" draw:mime-type="image/png"/></draw:frame></text:p>
      <text:p text:style-name="P5"><text:s/></text:p>
      <text:p text:style-name="P19">1.2 Click on the Manage Jenkins option as shown in the screenshot below → Click on the Nodes option as shown in the screenshot below.</text:p>
      <text:p text:style-name="P5"><draw:frame draw:style-name="fr1" draw:name="Image2" text:anchor-type="as-char" svg:width="6.5925in" svg:height="3.1244in" draw:z-index="1"><draw:image xlink:href="Pictures/100000000000076D000003852B782CC0.png" xlink:type="simple" xlink:show="embed" xlink:actuate="onLoad" draw:mime-type="image/png"/></draw:frame></text:p>
      <text:p text:style-name="P5"/>
      <text:p text:style-name="P19">1.3 Click on New Node</text:p>
      <text:p text:style-name="P5"><draw:frame draw:style-name="fr7" draw:name="Image3" text:anchor-type="as-char" svg:width="6.6929in" svg:height="1.3992in" draw:z-index="2"><draw:image xlink:href="Pictures/10000000000007770000025C7A620E49.png" xlink:type="simple" xlink:show="embed" xlink:actuate="onLoad" draw:mime-type="image/png"/></draw:frame></text:p>
      <text:p text:style-name="P5"/>
      <text:list text:style-name="WWNum16">
        <text:list-item>
          <text:list>
            <text:list-header>
              <text:p text:style-name="P2" loext:marker-style-name="T4"><text:span text:style-name="T5">1.4 </text:span><text:span text:style-name="T4">E</text:span><text:span text:style-name="annotation_20_reference"><text:span text:style-name="T4">nter the </text:span></text:span><text:span text:style-name="annotation_20_reference"><text:span text:style-name="T5">Node</text:span></text:span><text:span text:style-name="annotation_20_reference"><text:span text:style-name="T4"> name a</text:span></text:span><text:span text:style-name="T4">s </text:span><text:span text:style-name="T5">Agent1</text:span><text:span text:style-name="T4">, select the </text:span><text:span text:style-name="T5">Permanent Agent</text:span><text:span text:style-name="T4"> project option, and click on </text:span><text:span text:style-name="T5">Create</text:span></text:p>
            </text:list-header>
          </text:list>
        </text:list-item>
      </text:list>
      <text:p text:style-name="P5"><text:soft-page-break/><draw:frame draw:style-name="fr1" draw:name="Image4" text:anchor-type="as-char" svg:width="6.6929in" svg:height="1.8965in" draw:z-index="3"><draw:image xlink:href="Pictures/100000000000071200000201351AE94E.png" xlink:type="simple" xlink:show="embed" xlink:actuate="onLoad" draw:mime-type="image/png"/></draw:frame></text:p>
      <text:p text:style-name="P5"/>
      <text:p text:style-name="P3">1.5 Add the path of Agent1 folder from directory.</text:p>
      <text:h text:style-name="P1" text:outline-level="1"><draw:frame draw:style-name="fr1" draw:name="Image5" text:anchor-type="as-char" svg:width="6.6929in" svg:height="3.1654in" draw:z-index="4"><draw:image xlink:href="Pictures/100000000000076A00000382D132734D.png" xlink:type="simple" xlink:show="embed" xlink:actuate="onLoad" draw:mime-type="image/png"/></draw:frame></text:h>
      <text:p text:style-name="P25"><text:span text:style-name="T14">1.6 </text:span><text:span text:style-name="T17">Similarly create Agent 2</text:span></text:p>
      <text:p text:style-name="P26"><draw:frame draw:style-name="fr6" draw:name="Image6" text:anchor-type="as-char" svg:width="6.6929in" svg:height="1.9862in" draw:z-index="5"><draw:image xlink:href="Pictures/10000000000006FF000002D49B4FD5FE.png" xlink:type="simple" xlink:show="embed" xlink:actuate="onLoad" draw:mime-type="image/png"/></draw:frame></text:p>
      <text:p text:style-name="P26"><text:soft-page-break/><draw:frame draw:style-name="fr1" draw:name="Image7" text:anchor-type="as-char" svg:width="6.6929in" svg:height="2.9346in" draw:z-index="6"><draw:image xlink:href="Pictures/1000000000000769000003409DB3BEFB.png" xlink:type="simple" xlink:show="embed" xlink:actuate="onLoad" draw:mime-type="image/png"/></draw:frame></text:p>
      <text:p text:style-name="P10"/>
      <text:p text:style-name="P20">Step 2. Connect Agent to master node</text:p>
      <text:p text:style-name="P8"/>
      <text:p text:style-name="P23">2.1 Go to Manage Jenkins → Click on Agent1</text:p>
      <text:p text:style-name="P12"/>
      <text:p text:style-name="P12"><draw:frame draw:style-name="fr5" draw:name="Image8" text:anchor-type="as-char" svg:width="6.6929in" svg:height="1.6362in" draw:z-index="7"><draw:image xlink:href="Pictures/1000000000000780000002E1D396CAB3.png" xlink:type="simple" xlink:show="embed" xlink:actuate="onLoad" draw:mime-type="image/png"/></draw:frame></text:p>
      <text:p text:style-name="P12"/>
      <text:p text:style-name="P12"/>
      <text:p text:style-name="P23">2.2 Copy the command → Run form agent command line for unix/linux</text:p>
      <text:p text:style-name="P23"/>
      <text:p text:style-name="P12"><draw:frame draw:style-name="fr1" draw:name="Image9" text:anchor-type="as-char" svg:width="6.6929in" svg:height="3.2252in" draw:z-index="8"><draw:image xlink:href="Pictures/10000000000007800000039D9D822F9F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23">2.3 Go to folder Agent1 and open cmd/terminal And Run command</text:p>
      <text:p text:style-name="P23"/>
      <text:p text:style-name="P12"><draw:frame draw:style-name="fr1" draw:name="Image10" text:anchor-type="as-char" svg:width="6.6929in" svg:height="1.1992in" draw:z-index="9"><draw:image xlink:href="Pictures/100000010000076F0000015530FC65EE.png" xlink:type="simple" xlink:show="embed" xlink:actuate="onLoad" draw:mime-type="image/png"/></draw:frame></text:p>
      <text:p text:style-name="P12"/>
      <text:p text:style-name="P13"><draw:frame draw:style-name="fr1" draw:name="Image12" text:anchor-type="as-char" svg:width="6.6929in" svg:height="1.3327in" draw:z-index="10"><draw:image xlink:href="Pictures/10000001000007740000017C012F57B6.png" xlink:type="simple" xlink:show="embed" xlink:actuate="onLoad" draw:mime-type="image/png"/></draw:frame></text:p>
      <text:p text:style-name="P13"/>
      <text:p text:style-name="P22">Note: Do not close the terminal and do not type ctrl + c</text:p>
      <text:p text:style-name="P15"/>
      <text:p text:style-name="P23">2.4 Similary with Agent2/ Slave 2 in new terminal</text:p>
      <text:p text:style-name="P13"/>
      <text:p text:style-name="P13"><draw:frame draw:style-name="fr1" draw:name="Image13" text:anchor-type="as-char" svg:width="6.6929in" svg:height="1.9654in" draw:z-index="11"><draw:image xlink:href="Pictures/10000000000007620000022B734A5EF1.png" xlink:type="simple" xlink:show="embed" xlink:actuate="onLoad" draw:mime-type="image/png"/></draw:frame></text:p>
      <text:p text:style-name="P13"/>
      <text:p text:style-name="P13"><draw:frame draw:style-name="fr1" draw:name="Image14" text:anchor-type="as-char" svg:width="6.6929in" svg:height="0.7028in" draw:z-index="12"><draw:image xlink:href="Pictures/100000000000077D000000CAF8D89450.png" xlink:type="simple" xlink:show="embed" xlink:actuate="onLoad" draw:mime-type="image/png"/></draw:frame></text:p>
      <text:p text:style-name="P13"/>
      <text:p text:style-name="P13"><draw:frame draw:style-name="fr1" draw:name="Image15" text:anchor-type="as-char" svg:width="6.6929in" svg:height="1.6783in" draw:z-index="13"><draw:image xlink:href="Pictures/100000000000077F000001E12C96E7A0.png" xlink:type="simple" xlink:show="embed" xlink:actuate="onLoad" draw:mime-type="image/png"/></draw:frame></text:p>
      <text:p text:style-name="P13"/>
      <text:p text:style-name="P23"/>
      <text:p text:style-name="P23"/>
      <text:p text:style-name="P23"/>
      <text:p text:style-name="P23"/>
      <text:p text:style-name="P23"><text:soft-page-break/>2.5 Now both the Agents are connected to master</text:p>
      <text:p text:style-name="P23"/>
      <text:p text:style-name="P13"><draw:frame draw:style-name="fr4" draw:name="Image16" text:anchor-type="as-char" svg:width="6.6929in" svg:height="1.7571in" draw:z-index="14"><draw:image xlink:href="Pictures/10000000000007800000023A70DBFACB.png" xlink:type="simple" xlink:show="embed" xlink:actuate="onLoad" draw:mime-type="image/png"/></draw:frame></text:p>
      <text:p text:style-name="P9"/>
      <text:p text:style-name="P8"/>
      <text:p text:style-name="P20">Step 3: Run jobs on Agent nodes</text:p>
      <text:p text:style-name="P4"/>
      <text:p text:style-name="P11"><text:span text:style-name="T16"><text:s text:c="3"/></text:span><text:span text:style-name="T7"><text:s text:c="2"/>3.1 Go to New Item → Enter name as <text:s/>Agent1_Job1 → select Maven Project → Click Ok</text:span></text:p>
      <text:p text:style-name="P13"/>
      <text:p text:style-name="P14"><draw:frame draw:style-name="fr1" draw:name="Image17" text:anchor-type="as-char" svg:width="6.6929in" svg:height="3.039in" draw:z-index="15"><draw:image xlink:href="Pictures/10000000000007770000038649AE68BD.png" xlink:type="simple" xlink:show="embed" xlink:actuate="onLoad" draw:mime-type="image/png"/></draw:frame></text:p>
      <text:p text:style-name="P14"/>
      <text:p text:style-name="P24">3.2 In repository URL paste Github URL → add branch name</text:p>
      <text:p text:style-name="P14"><draw:frame draw:style-name="fr3" draw:name="Image18" text:anchor-type="as-char" svg:y="-3.0972in" svg:width="6.3516in" svg:height="3.0091in" draw:z-index="16"><draw:image xlink:href="Pictures/1000000000000774000003889B62C1C5.png" xlink:type="simple" xlink:show="embed" xlink:actuate="onLoad" draw:mime-type="image/png"/></draw:frame><text:line-break/></text:p>
      <text:p text:style-name="P24"><text:soft-page-break/>3.3 Click on Restrict where this object can be run → Label Expression as Slave-1</text:p>
      <text:p text:style-name="P18"><text:span text:style-name="T15"/></text:p>
      <text:p text:style-name="P12"><draw:frame draw:style-name="fr1" draw:name="Image19" text:anchor-type="as-char" svg:width="6.6929in" svg:height="3.2291in" draw:z-index="17"><draw:image xlink:href="Pictures/100000000000077500000399188AE50A.png" xlink:type="simple" xlink:show="embed" xlink:actuate="onLoad" draw:mime-type="image/png"/></draw:frame></text:p>
      <text:p text:style-name="P12"/>
      <text:p text:style-name="P24">3.4 Do the same steps for Agent2 </text:p>
      <text:p text:style-name="P16"/>
      <text:p text:style-name="P16"><draw:frame draw:style-name="fr1" draw:name="Image20" text:anchor-type="as-char" svg:width="6.6929in" svg:height="3.1799in" draw:z-index="18"><draw:image xlink:href="Pictures/1000000000000772000003894B9465F7.png" xlink:type="simple" xlink:show="embed" xlink:actuate="onLoad" draw:mime-type="image/png"/></draw:frame></text:p>
      <text:p text:style-name="P16"/>
      <text:p text:style-name="P16"><text:soft-page-break/><draw:frame draw:style-name="fr1" draw:name="Image21" text:anchor-type="as-char" svg:width="6.6929in" svg:height="3.1661in" draw:z-index="19"><draw:image xlink:href="Pictures/10000000000007720000038658EF5B8F.png" xlink:type="simple" xlink:show="embed" xlink:actuate="onLoad" draw:mime-type="image/png"/></draw:frame></text:p>
      <text:p text:style-name="P16"/>
      <text:p text:style-name="P16"><draw:frame draw:style-name="fr1" draw:name="Image22" text:anchor-type="as-char" svg:width="6.6929in" svg:height="2.9173in" draw:z-index="20"><draw:image xlink:href="Pictures/100000000000076F0000033E7A03CE2D.png" xlink:type="simple" xlink:show="embed" xlink:actuate="onLoad" draw:mime-type="image/png"/></draw:frame></text:p>
      <text:p text:style-name="P16"/>
      <text:p text:style-name="P16"><draw:frame draw:style-name="fr1" draw:name="Image23" text:anchor-type="as-char" svg:width="6.6929in" svg:height="3.1236in" draw:z-index="21"><draw:image xlink:href="Pictures/10000000000007710000037A608375F8.png" xlink:type="simple" xlink:show="embed" xlink:actuate="onLoad" draw:mime-type="image/png"/></draw:frame></text:p>
      <text:p text:style-name="P16"/>
      <text:p text:style-name="P16"/>
      <text:p text:style-name="P21"><text:soft-page-break/>Step 4: <text:s/>Now Build the jobs</text:p>
      <text:p text:style-name="P21"/>
      <text:p text:style-name="P16"><draw:frame draw:style-name="fr2" draw:name="Image24" text:anchor-type="char" svg:width="6.6929in" svg:height="2.8909in" draw:z-index="22"><draw:image xlink:href="Pictures/10000000000007800000033D33791275.png" xlink:type="simple" xlink:show="embed" xlink:actuate="onLoad" draw:mime-type="image/png"/></draw:frame></text:p>
      <text:p text:style-name="P16"><draw:frame draw:style-name="fr1" draw:name="Image25" text:anchor-type="as-char" svg:width="6.6929in" svg:height="2.8256in" draw:z-index="23"><draw:image xlink:href="Pictures/10000000000007800000032BBB88E88D.png" xlink:type="simple" xlink:show="embed" xlink:actuate="onLoad" draw:mime-type="image/png"/></draw:frame></text:p>
      <text:p text:style-name="P16"/>
      <text:p text:style-name="P16"/>
      <text:p text:style-name="P24">4.1 If the job run fails </text:p>
      <text:p text:style-name="P24"><text:s text:c="3"/><text:tab/>4.1.1: Install full JDK in both terminal</text:p>
      <text:p text:style-name="P11"><text:span text:style-name="Source_20_Text"><text:span text:style-name="T7"><text:s text:c="2"/><text:tab/> <text:s/><text:tab/> <text:s/></text:span></text:span><text:span text:style-name="Source_20_Text"><text:span text:style-name="T11">sudo apt update </text:span></text:span></text:p>
      <text:p text:style-name="P11"><text:span text:style-name="Source_20_Text"><text:span text:style-name="T13"><text:tab/> <text:s text:c="2"/><text:tab/> </text:span></text:span><text:span text:style-name="Source_20_Text"><text:span text:style-name="T11">sudo apt install openjdk-17-jdk -y</text:span></text:span></text:p>
      <text:p text:style-name="P11"><text:span text:style-name="T7"><text:tab/>4.1.2 : Verify Again: </text:span><text:span text:style-name="Source_20_Text"><text:span text:style-name="T11">ls /usr/lib/jvm/java-17-openjdk-amd64/bin/javac</text:span></text:span></text:p>
      <text:p text:style-name="P11"><text:span text:style-name="T7"><text:tab/><text:tab/><text:tab/> <text:s text:c="8"/></text:span><text:span text:style-name="Source_20_Text"><text:span text:style-name="T11">javac -version</text:span></text:span></text:p>
      <text:p text:style-name="P11"><text:span text:style-name="Source_20_Text"><text:span text:style-name="T7"><text:s text:c="8"/><text:tab/><text:tab/> </text:span></text:span><text:span text:style-name="T7">Expected: <text:s/></text:span><text:span text:style-name="Source_20_Text"><text:span text:style-name="T11">javac 17...</text:span></text:span></text:p>
      <text:p text:style-name="P11"><text:span text:style-name="T7"><text:tab/>4.1.3<text:tab/> Go to: </text:span><text:span text:style-name="Source_20_Text"><text:span text:style-name="T7">Manage Jenkins → Tools → JDK Installations → </text:span></text:span><text:span text:style-name="T7">Add → </text:span><text:span text:style-name="Source_20_Text"><text:span text:style-name="T7">/usr/lib/jvm/java-17-openjdk-amd64</text:span></text:span></text:p>
      <text:p text:style-name="P16"><text:soft-page-break/><draw:frame draw:style-name="fr1" draw:name="Image26" text:anchor-type="as-char" svg:width="6.6929in" svg:height="2.5098in" draw:z-index="24"><draw:image xlink:href="Pictures/1000000000000780000002D072DE48C5.png" xlink:type="simple" xlink:show="embed" xlink:actuate="onLoad" draw:mime-type="image/png"/></draw:frame></text:p>
      <text:p text:style-name="P16"/>
      <text:p text:style-name="P16"/>
      <text:p text:style-name="P11"><text:span text:style-name="T6">Step 5: Check the Jobs </text:span></text:p>
      <text:p text:style-name="P18"/>
      <text:p text:style-name="P16"><draw:frame draw:style-name="fr1" draw:name="Image27" text:anchor-type="as-char" svg:width="6.6929in" svg:height="1.3299in" draw:z-index="25"><draw:image xlink:href="Pictures/100000000000048F000000E8B3A05252.png" xlink:type="simple" xlink:show="embed" xlink:actuate="onLoad" draw:mime-type="image/png"/></draw:frame></text:p>
      <text:p text:style-name="P16"/>
      <text:p text:style-name="P24">5.1 Go To target folder of Agent1 → ls → run sl-calc.jar</text:p>
      <text:p text:style-name="P18"><text:s text:c="5"/></text:p>
      <text:p text:style-name="P16"><draw:frame draw:style-name="fr1" draw:name="Image30" text:anchor-type="as-char" svg:width="6.6929in" svg:height="0.9783in" draw:z-index="28"><draw:image xlink:href="Pictures/1000000100000774000001174410F3B8.png" xlink:type="simple" xlink:show="embed" xlink:actuate="onLoad" draw:mime-type="image/png"/></draw:frame></text:p>
      <text:p text:style-name="P16"/>
      <text:p text:style-name="P24">5.2 Similarly do for Agent2</text:p>
      <text:p text:style-name="P18"/>
      <text:p text:style-name="P16"><draw:frame draw:style-name="fr1" draw:name="Image28" text:anchor-type="as-char" svg:width="6.6929in" svg:height="1.2681in" draw:z-index="26"><draw:image xlink:href="Pictures/10000000000005D00000011AE251F17B.png" xlink:type="simple" xlink:show="embed" xlink:actuate="onLoad" draw:mime-type="image/png"/></draw:frame></text:p>
      <text:p text:style-name="P16"/>
      <text:p text:style-name="P16"/>
      <text:p text:style-name="P16"><draw:frame draw:style-name="fr1" draw:name="Image29" text:anchor-type="as-char" svg:width="6.6929in" svg:height="0.9256in" draw:z-index="27"><draw:image xlink:href="Pictures/1000000100000774000001085C8FE9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aden Sans" svg:font-family="'Almaden Sans', Helvetica, 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text:style-name="ListLabel_20_13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20:33:19.532458317</meta:creation-date>
    <dc:date>2026-05-20T09:50:08.515869432</dc:date>
    <meta:editing-duration>PT18M53S</meta:editing-duration>
    <meta:editing-cycles>3</meta:editing-cycles>
    <meta:generator>LibreOffice/24.2.7.2$Linux_X86_64 LibreOffice_project/420$Build-2</meta:generator>
    <meta:document-statistic meta:table-count="0" meta:image-count="29" meta:object-count="0" meta:page-count="9" meta:paragraph-count="62" meta:word-count="281" meta:character-count="1584" meta:non-whitespace-character-count="1272"/>
  </office:meta>
</office:document-meta>
</file>