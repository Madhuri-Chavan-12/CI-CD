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1A0000033FF54811C0.png" manifest:media-type="image/png"/>
  <manifest:file-entry manifest:full-path="Pictures/100000000000077F00000380A3C0E7F3.png" manifest:media-type="image/png"/>
  <manifest:file-entry manifest:full-path="Pictures/100000000000074F0000032E28B28ED0.png" manifest:media-type="image/png"/>
  <manifest:file-entry manifest:full-path="Pictures/100000000000071D000003352681C41D.png" manifest:media-type="image/png"/>
  <manifest:file-entry manifest:full-path="Pictures/10000000000007460000034167D1F58A.png" manifest:media-type="image/png"/>
  <manifest:file-entry manifest:full-path="Pictures/10000000000007720000038964A782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feabf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2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feabf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3" style:family="paragraph" style:parent-style-name="List_20_Paragraph">
      <style:paragraph-properties fo:line-height="100%" fo:padding="0in" fo:border="none" style:shadow="none" style:join-border="false"/>
      <style:text-properties officeooo:paragraph-rsid="000feabf"/>
    </style:style>
    <style:style style:name="P4" style:family="paragraph" style:parent-style-name="List_20_Paragraph">
      <style:paragraph-properties fo:margin-left="0.25in" fo:line-height="100%" fo:padding="0in" fo:border="none" style:shadow="none" style:join-border="false"/>
      <style:text-properties officeooo:paragraph-rsid="000feabf"/>
    </style:style>
    <style:style style:name="P5" style:family="paragraph" style:parent-style-name="List_20_Paragraph">
      <style:text-properties officeooo:paragraph-rsid="000feabf"/>
    </style:style>
    <style:style style:name="P6" style:family="paragraph" style:parent-style-name="List_20_Paragraph" style:list-style-name="WWNum8">
      <style:text-properties officeooo:paragraph-rsid="000feabf"/>
    </style:style>
    <style:style style:name="P7" style:family="paragraph" style:parent-style-name="Standard">
      <style:paragraph-properties fo:text-align="center" style:justify-single-word="false"/>
      <style:text-properties officeooo:paragraph-rsid="000feabf"/>
    </style:style>
    <style:style style:name="P8" style:family="paragraph" style:parent-style-name="Standard">
      <style:paragraph-properties fo:line-height="100%" fo:padding="0in" fo:border="none" style:shadow="none" style:join-border="false"/>
      <style:text-properties officeooo:paragraph-rsid="000feabf"/>
    </style:style>
    <style:style style:name="P9" style:family="paragraph" style:parent-style-name="Standard">
      <style:paragraph-properties fo:line-height="100%" fo:padding="0in" fo:border="none" style:shadow="none" style:join-border="false"/>
      <style:text-properties fo:font-weight="normal" officeooo:paragraph-rsid="000feabf" style:font-weight-asian="normal" style:font-weight-complex="normal"/>
    </style:style>
    <style:style style:name="T1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8pt" fo:font-weight="bold" officeooo:rsid="0010a8d5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4pt" fo:font-weight="bold" officeooo:rsid="000feabf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4pt" fo:font-weight="bold" officeooo:rsid="000feabf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4pt" officeooo:rsid="000feabf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2pt" officeooo:rsid="000feabf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2pt" officeooo:rsid="000feabf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style:font-name="Calibri" fo:font-size="12pt" fo:font-weight="bold" officeooo:rsid="000feabf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style:font-name="Calibri" fo:font-size="12pt" fo:font-weight="normal" officeooo:rsid="000feabf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color="#404040" loext:opacity="100%" style:font-name="Calibri" fo:font-size="12pt" fo:font-weight="normal" style:font-name-asian="Calibri1" style:font-size-asian="12pt" style:font-weight-asian="normal" style:font-name-complex="Calibri1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font-weight="bold" style:font-weight-asian="bold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2">5. </text:span><text:span text:style-name="T1">Creating and Executing a Basic GitHub Actions Workflow</text:span></text:p>
      <text:p text:style-name="P7" loext:marker-style-name="T1"><text:span text:style-name="T12"/></text:p>
      <text:p text:style-name="P5" loext:marker-style-name="T7"><text:span text:style-name="T12"/></text:p>
      <text:p text:style-name="P5" loext:marker-style-name="T7"><text:span text:style-name="T12"/></text:p>
      <text:p text:style-name="P8" loext:marker-style-name="T3"><text:span text:style-name="T3">Step </text:span><text:span text:style-name="T4">1</text:span><text:span text:style-name="T3">: Create and execute a new workflow file</text:span></text:p>
      <text:p text:style-name="P8" loext:marker-style-name="T3"><text:span text:style-name="T5"/></text:p>
      <text:p text:style-name="P9" loext:marker-style-name="T3"><text:span text:style-name="T6">1.1 </text:span><text:span text:style-name="T9">Navigate to the Actions tab and click on set up a workflow yourself to create a .github/workflows directory</text:span></text:p>
      <text:p text:style-name="P8" loext:marker-style-name="T3"><text:span text:style-name="T12"/></text:p>
      <text:p text:style-name="P8" loext:marker-style-name="T3"><text:span text:style-name="T12"><draw:frame draw:style-name="fr3" draw:name="Image1" text:anchor-type="as-char" svg:width="6.6929in" svg:height="3.1799in" draw:z-index="0"><draw:image xlink:href="Pictures/10000000000007720000038964A78210.png" xlink:type="simple" xlink:show="embed" xlink:actuate="onLoad" draw:mime-type="image/png"/></draw:frame></text:span></text:p>
      <text:p text:style-name="P8" loext:marker-style-name="T3"><text:span text:style-name="T12"/></text:p>
      <text:p text:style-name="P8" loext:marker-style-name="T3"><text:span text:style-name="T13">1.2 </text:span><text:span text:style-name="T7">Create a new workflow file </text:span><text:span text:style-name="T11">basic-workflow.yml</text:span><text:span text:style-name="T7"> with the below code, then click on </text:span><text:span text:style-name="T11">Commit changes</text:span><text:span text:style-name="T7">:</text:span></text:p>
      <text:p text:style-name="P2" loext:marker-style-name="T11"/>
      <text:p text:style-name="P3" loext:marker-style-name="T11"><text:span text:style-name="T11"><draw:frame draw:style-name="fr1" draw:name="Frame1" text:anchor-type="as-char" svg:width="5.7744in" draw:z-index="6"><draw:text-box fo:min-height="2.9563in"><text:p text:style-name="P3" loext:marker-style-name="T11"><text:span text:style-name="T11">name: GitHub Actions Demo</text:span></text:p><text:p text:style-name="P3" loext:marker-style-name="T11"><text:span text:style-name="T11"/></text:p><text:p text:style-name="P3" loext:marker-style-name="T11"><text:span text:style-name="T11">run-name: Testing out GitHub Actions</text:span></text:p><text:p text:style-name="P3" loext:marker-style-name="T11"><text:span text:style-name="T11"/></text:p><text:p text:style-name="P3" loext:marker-style-name="T11"><text:span text:style-name="T11">on:</text:span></text:p><text:p text:style-name="P3" loext:marker-style-name="T11"><text:span text:style-name="T11"><text:s text:c="2"/>push:</text:span></text:p><text:p text:style-name="P3" loext:marker-style-name="T11"><text:span text:style-name="T11"/></text:p><text:p text:style-name="P3" loext:marker-style-name="T11"><text:span text:style-name="T11">jobs:</text:span></text:p><text:p text:style-name="P3" loext:marker-style-name="T11"><text:span text:style-name="T11"><text:s text:c="2"/>Basic-Workflow:</text:span></text:p><text:p text:style-name="P3" loext:marker-style-name="T11"><text:span text:style-name="T11"><text:s text:c="4"/>runs-on: ubuntu-latest</text:span></text:p><text:p text:style-name="P3" loext:marker-style-name="T11"><text:span text:style-name="T11"/></text:p><text:p text:style-name="P3" loext:marker-style-name="T11"><text:span text:style-name="T11"><text:s text:c="4"/>steps:</text:span></text:p><text:p text:style-name="P3" loext:marker-style-name="T11"><text:span text:style-name="T11"><text:s text:c="6"/>- run: echo "Job is executing as part of Basic workflow"</text:span></text:p><text:p text:style-name="P3" loext:marker-style-name="T11"/></draw:text-box></draw:frame></text:span></text:p>
      <text:p text:style-name="P3" loext:marker-style-name="T11"><text:soft-page-break/><text:span text:style-name="T11"><draw:frame draw:style-name="fr2" draw:name="Image2" text:anchor-type="as-char" svg:width="6.1929in" svg:height="2.7701in" draw:z-index="1"><draw:image xlink:href="Pictures/10000000000007460000034167D1F58A.png" xlink:type="simple" xlink:show="embed" xlink:actuate="onLoad" draw:mime-type="image/png"/></draw:frame></text:span></text:p>
      <text:p text:style-name="P1" loext:marker-style-name="T7"/>
      <text:list text:style-name="WWNum8">
        <text:list-item>
          <text:list>
            <text:list-header>
              <text:p text:style-name="P6" loext:marker-style-name="T7"><text:span text:style-name="T8">1.3 </text:span><text:span text:style-name="T7">Add the </text:span><text:span text:style-name="T11">Commit message</text:span><text:span text:style-name="T7"> as </text:span><text:span text:style-name="T11">Create basic-workflow.yml</text:span><text:span text:style-name="T7"> and then click on </text:span><text:span text:style-name="T11">Commit changes</text:span><text:span text:style-name="T7"> to save the workflow file in the code repository</text:span></text:p>
              <text:p text:style-name="P6" loext:marker-style-name="T7"><text:span text:style-name="T7"/></text:p>
            </text:list-header>
          </text:list>
        </text:list-item>
      </text:list>
      <text:p text:style-name="P5" loext:marker-style-name="T7"><text:span text:style-name="T7"><draw:frame draw:style-name="fr2" draw:name="Image3" text:anchor-type="as-char" svg:width="6.1929in" svg:height="2.7917in" draw:z-index="2"><draw:image xlink:href="Pictures/100000000000071D000003352681C41D.png" xlink:type="simple" xlink:show="embed" xlink:actuate="onLoad" draw:mime-type="image/png"/></draw:frame></text:span></text:p>
      <text:p text:style-name="P5" loext:marker-style-name="T7"><text:span text:style-name="T7"/></text:p>
      <text:list text:continue-numbering="true" text:style-name="WWNum8">
        <text:list-item>
          <text:list>
            <text:list-header>
              <text:p text:style-name="P6" loext:marker-style-name="T7"><text:span text:style-name="T8">1.4 </text:span><text:span text:style-name="T7">Navigate to the </text:span><text:span text:style-name="T12">Actions</text:span><text:span text:style-name="T7"> tab to access the workflow execution, and under </text:span><text:span text:style-name="T12">All workflows,</text:span><text:span text:style-name="T7"> click on the </text:span><text:span text:style-name="T12">Testing out GitHub Actions</text:span></text:p>
            </text:list-header>
          </text:list>
        </text:list-item>
      </text:list>
      <text:p text:style-name="P5" loext:marker-style-name="T7"><text:span text:style-name="T12"/></text:p>
      <text:p text:style-name="P5" loext:marker-style-name="T7"><text:span text:style-name="T12"><draw:frame draw:style-name="fr2" draw:name="Image4" text:anchor-type="as-char" svg:width="6.1929in" svg:height="2.6937in" draw:z-index="3"><draw:image xlink:href="Pictures/100000000000074F0000032E28B28ED0.png" xlink:type="simple" xlink:show="embed" xlink:actuate="onLoad" draw:mime-type="image/png"/></draw:frame></text:span></text:p>
      <text:list text:continue-numbering="true" text:style-name="WWNum8">
        <text:list-item>
          <text:list>
            <text:list-header>
              <text:p text:style-name="P6" loext:marker-style-name="T7"><text:span text:style-name="T14">1.5 </text:span><text:span text:style-name="T15">Click on the Basic-Workflow to view the job execution details</text:span></text:p>
            </text:list-header>
          </text:list>
        </text:list-item>
      </text:list>
      <text:p text:style-name="P3" loext:marker-style-name="T7"><text:soft-page-break/></text:p>
      <text:p text:style-name="P3" loext:marker-style-name="T7"><draw:frame draw:style-name="fr2" draw:name="Image5" text:anchor-type="as-char" svg:width="6.1929in" svg:height="2.8307in" draw:z-index="4"><draw:image xlink:href="Pictures/100000000000071A0000033FF54811C0.png" xlink:type="simple" xlink:show="embed" xlink:actuate="onLoad" draw:mime-type="image/png"/></draw:frame></text:p>
      <text:p text:style-name="P3" loext:marker-style-name="T7"/>
      <text:p text:style-name="P4" loext:marker-style-name="T11"><text:span text:style-name="T8">1.6 </text:span><text:span text:style-name="T7">Expand the output under the </text:span><text:span text:style-name="T11">Basic-Workflow</text:span></text:p>
      <text:p text:style-name="P4" loext:marker-style-name="T11"><text:span text:style-name="T11"/></text:p>
      <text:p text:style-name="P1" loext:marker-style-name="T7"><text:span text:style-name="T16"><draw:frame draw:style-name="fr2" draw:name="Image6" text:anchor-type="as-char" svg:width="6.1929in" svg:height="2.8917in" draw:z-index="5"><draw:image xlink:href="Pictures/100000000000077F00000380A3C0E7F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 style:font-weight-complex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>
      <style:text-properties fo:font-weight="normal" style:font-weight-asian="normal"/>
    </style:style>
    <style:style style:name="ListLabel_20_68" style:display-name="ListLabel 68" style:family="text">
      <style:text-properties fo:font-weight="normal" style:font-weight-asian="normal"/>
    </style:style>
    <style:style style:name="ListLabel_20_69" style:display-name="ListLabel 69" style:family="text">
      <style:text-properties fo:font-weight="normal" style:font-weight-asian="normal"/>
    </style:style>
    <style:style style:name="ListLabel_20_70" style:display-name="ListLabel 70" style:family="text">
      <style:text-properties fo:font-weight="normal" style:font-weight-asian="normal"/>
    </style:style>
    <style:style style:name="ListLabel_20_71" style:display-name="ListLabel 71" style:family="text">
      <style:text-properties fo:font-weight="normal" style:font-weight-asian="normal"/>
    </style:style>
    <style:style style:name="ListLabel_20_72" style:display-name="ListLabel 72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2.%1%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8T19:41:14.621593199</meta:creation-date>
    <dc:date>2026-05-18T19:58:52.199583794</dc:date>
    <meta:editing-duration>PT7M14S</meta:editing-duration>
    <meta:editing-cycles>1</meta:editing-cycles>
    <meta:document-statistic meta:table-count="0" meta:image-count="6" meta:object-count="0" meta:page-count="3" meta:paragraph-count="24" meta:word-count="169" meta:character-count="1030" meta:non-whitespace-character-count="859"/>
    <meta:generator>LibreOffice/24.2.7.2$Linux_X86_64 LibreOffice_project/420$Build-2</meta:generator>
  </office:meta>
</office:document-meta>
</file>