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6A000003671F872ED6.png" manifest:media-type="image/png"/>
  <manifest:file-entry manifest:full-path="Pictures/10000001000004BD000001FC8DA4B622.png" manifest:media-type="image/png"/>
  <manifest:file-entry manifest:full-path="Pictures/1000000000000779000000CF7E97E70A.png" manifest:media-type="image/png"/>
  <manifest:file-entry manifest:full-path="Pictures/100000000000077E0000033CB4ED3A18.png" manifest:media-type="image/png"/>
  <manifest:file-entry manifest:full-path="Pictures/1000000000000768000001BE3724DB21.png" manifest:media-type="image/png"/>
  <manifest:file-entry manifest:full-path="Pictures/100000000000076B00000340A1F611EE.png" manifest:media-type="image/png"/>
  <manifest:file-entry manifest:full-path="Pictures/1000000000000780000001E868CB3362.png" manifest:media-type="image/png"/>
  <manifest:file-entry manifest:full-path="Pictures/10000000000007680000012E6B34ABE3.png" manifest:media-type="image/png"/>
  <manifest:file-entry manifest:full-path="Pictures/100000000000076E00000371AB2CD95B.png" manifest:media-type="image/png"/>
  <manifest:file-entry manifest:full-path="Pictures/1000000000000712000000DF7D534FFA.png" manifest:media-type="image/png"/>
  <manifest:file-entry manifest:full-path="Pictures/100000000000076E000002CEACECD89C.png" manifest:media-type="image/png"/>
  <manifest:file-entry manifest:full-path="Pictures/100000000000078000000380949882B2.png" manifest:media-type="image/png"/>
  <manifest:file-entry manifest:full-path="Pictures/100000000000072E00000139EB6079F2.png" manifest:media-type="image/png"/>
  <manifest:file-entry manifest:full-path="Pictures/100000000000076E0000029A678BFD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5">
      <style:paragraph-properties fo:margin-left="0in" fo:line-height="100%" fo:text-indent="-0.25in" style:auto-text-indent="false" fo:padding="0in" fo:border="none" style:shadow="none" style:join-border="false"/>
      <style:text-properties officeooo:paragraph-rsid="000e5865"/>
    </style:style>
    <style:style style:name="P2" style:family="paragraph" style:parent-style-name="List_20_Paragraph" style:list-style-name="WWNum15">
      <style:paragraph-properties fo:margin-left="0in" fo:line-height="100%" fo:text-indent="0in" style:auto-text-indent="false" fo:padding="0in" fo:border="none" style:shadow="none" style:join-border="false"/>
      <style:text-properties officeooo:paragraph-rsid="000e5865"/>
    </style:style>
    <style:style style:name="P3" style:family="paragraph" style:parent-style-name="List_20_Paragraph" style:list-style-name="WWNum16">
      <style:paragraph-properties fo:margin-left="0in" fo:line-height="100%" fo:text-indent="-0.25in" style:auto-text-indent="false" fo:padding="0in" fo:border="none" style:shadow="none" style:join-border="false"/>
      <style:text-properties officeooo:paragraph-rsid="000e5865"/>
    </style:style>
    <style:style style:name="P4" style:family="paragraph" style:parent-style-name="List_20_Paragraph">
      <style:paragraph-properties fo:margin-left="0in" fo:line-height="100%" fo:text-indent="0in" style:auto-text-indent="false" fo:padding="0in" fo:border="none" style:shadow="none" style:join-border="false"/>
      <style:text-properties officeooo:paragraph-rsid="000e5865"/>
    </style:style>
    <style:style style:name="P5" style:family="paragraph" style:parent-style-name="Normal3" style:list-style-name="WWNum7">
      <style:paragraph-properties fo:margin-left="0in" fo:line-height="100%" fo:text-indent="-0.25in" style:auto-text-indent="false"/>
      <style:text-properties officeooo:paragraph-rsid="000e5865"/>
    </style:style>
    <style:style style:name="P6" style:family="paragraph" style:parent-style-name="Normal3" style:list-style-name="WWNum7">
      <style:paragraph-properties fo:margin-left="0in" fo:line-height="100%" fo:text-indent="0in" style:auto-text-indent="false"/>
      <style:text-properties officeooo:paragraph-rsid="000e5865"/>
    </style:style>
    <style:style style:name="P7" style:family="paragraph" style:parent-style-name="Normal3">
      <style:paragraph-properties fo:margin-left="0in" fo:line-height="100%" fo:text-indent="0in" style:auto-text-indent="false"/>
      <style:text-properties officeooo:paragraph-rsid="000e5865"/>
    </style:style>
    <style:style style:name="P8" style:family="paragraph" style:parent-style-name="Normal3" style:list-style-name="WWNum16">
      <style:paragraph-properties fo:margin-left="0in" fo:line-height="100%" fo:text-indent="-0.25in" style:auto-text-indent="false"/>
      <style:text-properties officeooo:paragraph-rsid="000e5865"/>
    </style:style>
    <style:style style:name="P9" style:family="paragraph" style:parent-style-name="Normal3">
      <style:paragraph-properties fo:margin-left="0in" fo:line-height="100%" fo:text-indent="0in" style:auto-text-indent="false"/>
      <style:text-properties fo:color="#404040" loext:opacity="100%" style:font-name="Calibri" fo:font-size="12pt" officeooo:paragraph-rsid="000e5865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Standard">
      <style:paragraph-properties fo:margin-left="0in" fo:line-height="100%" fo:text-indent="0in" style:auto-text-indent="false" fo:padding="0in" fo:border="none" style:shadow="none" style:join-border="false"/>
      <style:text-properties officeooo:paragraph-rsid="000e5865"/>
    </style:style>
    <style:style style:name="P11" style:family="paragraph" style:parent-style-name="Standard">
      <style:paragraph-properties fo:margin-left="0in" fo:text-align="center" style:justify-single-word="false" fo:text-indent="0in" style:auto-text-indent="false"/>
      <style:text-properties officeooo:paragraph-rsid="000e5865"/>
    </style:style>
    <style:style style:name="P12" style:family="paragraph" style:parent-style-name="Standard">
      <style:paragraph-properties fo:margin-left="0in" fo:line-height="100%" fo:text-indent="0in" style:auto-text-indent="false" fo:padding="0in" fo:border="none" style:shadow="none" style:join-border="false"/>
      <style:text-properties fo:color="#404040" loext:opacity="100%" style:font-name="Calibri" fo:font-size="12pt" fo:font-weight="bold" officeooo:paragraph-rsid="000e5865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>
      <style:paragraph-properties fo:margin-left="0in" fo:text-indent="0in" style:auto-text-indent="false"/>
      <style:text-properties officeooo:paragraph-rsid="000e5865"/>
    </style:style>
    <style:style style:name="T1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2pt" officeooo:rsid="000e5865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2pt" fo:font-weight="bold" officeooo:rsid="000e5865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fo:font-weight="bold" officeooo:rsid="000e5865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2pt" fo:language="en" fo:country="US" fo:font-weight="bold" style:font-name-asian="Calibri1" style:font-size-asian="12pt" style:font-weight-asian="bold" style:font-name-complex="F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2pt" fo:language="en" fo:country="US" fo:font-weight="bold" officeooo:rsid="000e5865" style:font-name-asian="Calibri1" style:font-size-asian="12pt" style:font-weight-asian="bold" style:font-name-complex="F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2pt" fo:language="en" fo:country="US" fo:font-weight="bold" officeooo:rsid="000e5865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color="#404040" loext:opacity="100%" style:font-name="Calibri" fo:font-size="14pt" style:font-name-asian="Calibri1" style:font-size-asian="14pt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color="#404040" loext:opacity="100%" style:font-name="Calibri" fo:font-size="14pt" fo:language="en" fo:country="US" fo:font-weight="bold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2"><text:span text:style-name="T12">Setting up Git Configuration in Jenkins Job</text:span></text:p>
      <text:p text:style-name="P13" loext:marker-style-name="T1"><text:span text:style-name="T13"/></text:p>
      <text:p text:style-name="P13" loext:marker-style-name="T1"><text:span text:style-name="T13"/></text:p>
      <text:p text:style-name="P13" loext:marker-style-name="T1"><text:span text:style-name="T13">Step 1:</text:span><text:span text:style-name="T15"> </text:span><text:span text:style-name="T14">Create new credentials in Jenkins for Git configuration</text:span></text:p>
      <text:p text:style-name="P12" loext:marker-style-name="T3"/>
      <text:list text:style-name="WWNum7">
        <text:list-header>
          <text:p text:style-name="P5" loext:marker-style-name="T1"><text:span text:style-name="T1"><text:s/></text:span><text:span text:style-name="T2">1.1 </text:span><text:span text:style-name="T1"><text:s/>Log in to Jenkins using credentials</text:span></text:p>
        </text:list-header>
      </text:list>
      <text:p text:style-name="P9" loext:marker-style-name="T1"/>
      <text:p text:style-name="P7" loext:marker-style-name="T1"><draw:frame draw:style-name="fr5" draw:name="Picture 3" text:anchor-type="as-char" svg:width="6.8083in" svg:height="2.722in" draw:z-index="0"><draw:image xlink:href="Pictures/10000001000004BD000001FC8DA4B622.png" xlink:type="simple" xlink:show="embed" xlink:actuate="onLoad" draw:mime-type="image/png"/></draw:frame><text:span text:style-name="T1"><text:s/></text:span></text:p>
      <text:p text:style-name="P7" loext:marker-style-name="T1"><text:span text:style-name="T1"/></text:p>
      <text:list text:continue-numbering="true" text:style-name="WWNum7">
        <text:list-header>
          <text:p text:style-name="P5" loext:marker-style-name="T1"><text:span text:style-name="T2">1.2 </text:span><text:span text:style-name="T1">Navigate to </text:span><text:span text:style-name="T3">Manage Jenkins</text:span><text:span text:style-name="T1"> and click on </text:span><text:span text:style-name="T3">Credentials</text:span></text:p>
        </text:list-header>
      </text:list>
      <text:p text:style-name="P7" loext:marker-style-name="T1"/>
      <text:p text:style-name="P7" loext:marker-style-name="T1"><draw:frame draw:style-name="fr4" draw:name="Image1" text:anchor-type="as-char" svg:width="6.6929in" svg:height="3.102in" draw:z-index="2"><draw:image xlink:href="Pictures/100000000000076E00000371AB2CD95B.png" xlink:type="simple" xlink:show="embed" xlink:actuate="onLoad" draw:mime-type="image/png"/></draw:frame></text:p>
      <text:p text:style-name="P9" loext:marker-style-name="T1"/>
      <text:list text:continue-numbering="true" text:style-name="WWNum7">
        <text:list-header>
          <text:p text:style-name="P6" loext:marker-style-name="T1"><text:span text:style-name="T2">1.3 </text:span><text:span text:style-name="T1">Click on </text:span><text:span text:style-name="T3">System</text:span><text:span text:style-name="T1"> under </text:span><text:span text:style-name="T3">Stores scoped to Jenkins</text:span><text:span text:style-name="T1"> and then click on </text:span><text:span text:style-name="T3">Global credentials</text:span></text:p>
        </text:list-header>
      </text:list>
      <text:p text:style-name="P9" loext:marker-style-name="T1"/>
      <text:p text:style-name="P7" loext:marker-style-name="T1"><text:soft-page-break/><draw:frame draw:style-name="fr3" draw:name="Image2" text:anchor-type="as-char" svg:width="6.1929in" svg:height="1.4543in" draw:z-index="3"><draw:image xlink:href="Pictures/1000000000000768000001BE3724DB21.png" xlink:type="simple" xlink:show="embed" xlink:actuate="onLoad" draw:mime-type="image/png"/></draw:frame></text:p>
      <text:p text:style-name="P7" loext:marker-style-name="T1"/>
      <text:p text:style-name="P7" loext:marker-style-name="T1"/>
      <text:p text:style-name="P7" loext:marker-style-name="T1"><draw:frame draw:style-name="fr3" draw:name="Image3" text:anchor-type="as-char" svg:width="6.1929in" svg:height="0.9839in" draw:z-index="5"><draw:image xlink:href="Pictures/10000000000007680000012E6B34ABE3.png" xlink:type="simple" xlink:show="embed" xlink:actuate="onLoad" draw:mime-type="image/png"/></draw:frame></text:p>
      <text:p text:style-name="P7" loext:marker-style-name="T1"/>
      <text:list text:continue-numbering="true" text:style-name="WWNum7">
        <text:list-header>
          <text:p text:style-name="P5" loext:marker-style-name="T1"><text:span text:style-name="T2">1.4 </text:span><text:span text:style-name="T1">Click on </text:span><text:span text:style-name="T3">+</text:span><text:span text:style-name="T1"> </text:span><text:span text:style-name="T3">Add Credentials</text:span></text:p>
          <text:p text:style-name="P5" loext:marker-style-name="T1"><text:span text:style-name="T3"/></text:p>
          <text:p text:style-name="P5" loext:marker-style-name="T1"><text:span text:style-name="T3"><draw:frame draw:style-name="fr3" draw:name="Image4" text:anchor-type="as-char" svg:width="6.4429in" svg:height="1.0965in" draw:z-index="6"><draw:image xlink:href="Pictures/100000000000072E00000139EB6079F2.png" xlink:type="simple" xlink:show="embed" xlink:actuate="onLoad" draw:mime-type="image/png"/></draw:frame></text:span></text:p>
          <text:p text:style-name="P5"><text:span text:style-name="T8"/></text:p>
          <text:p text:style-name="P6"><text:span text:style-name="T9">1.5 </text:span><text:span text:style-name="T8">Under Kind, select the Username with password option </text:span></text:p>
          <text:p text:style-name="P5"><text:span text:style-name="T8"><text:s/></text:span></text:p>
          <text:p text:style-name="P5"><draw:frame draw:style-name="fr2" draw:name="Image5" text:anchor-type="char" svg:width="6.4429in" svg:height="0.7929in" draw:z-index="4"><draw:image xlink:href="Pictures/1000000000000712000000DF7D534FFA.png" xlink:type="simple" xlink:show="embed" xlink:actuate="onLoad" draw:mime-type="image/png"/></draw:frame><text:span text:style-name="T8"/></text:p>
          <text:p text:style-name="P5" loext:marker-style-name="T3"><text:span text:style-name="T11">1.6 </text:span><text:span text:style-name="T10">Add your GitHub Username and Password, assign Project as the ID, and click on Create</text:span></text:p>
        </text:list-header>
      </text:list>
      <text:p text:style-name="P7" loext:marker-style-name="T3"><text:span text:style-name="T10"/></text:p>
      <text:p text:style-name="P7" loext:marker-style-name="T3"><text:span text:style-name="T10"><draw:frame draw:style-name="fr4" draw:name="Image6" text:anchor-type="as-char" svg:width="6.6929in" svg:height="2.9327in" draw:z-index="7"><draw:image xlink:href="Pictures/100000000000076B00000340A1F611EE.png" xlink:type="simple" xlink:show="embed" xlink:actuate="onLoad" draw:mime-type="image/png"/></draw:frame></text:span></text:p>
      <text:p text:style-name="P10" loext:marker-style-name="T14"><text:span text:style-name="T16"/></text:p>
      <text:p text:style-name="P10" loext:marker-style-name="T14"><text:span text:style-name="T16"/></text:p>
      <text:p text:style-name="P10" loext:marker-style-name="T14"><text:soft-page-break/><text:span text:style-name="T16">Step 2: Create a Jenkins freestyle project</text:span></text:p>
      <text:p text:style-name="P10" loext:marker-style-name="T14"><text:span text:style-name="T16"/></text:p>
      <text:list text:style-name="WWNum16">
        <text:list-item>
          <text:list>
            <text:list-item>
              <text:p text:style-name="P8" loext:marker-style-name="T1"><text:span text:style-name="T10">On the Jenkins dashboard, click on + New Item</text:span></text:p>
              <text:p text:style-name="P8" loext:marker-style-name="T1"><text:span text:style-name="T10"><draw:frame draw:style-name="fr3" draw:name="Image7" text:anchor-type="as-char" svg:width="6.4429in" svg:height="0.6957in" draw:z-index="8"><draw:image xlink:href="Pictures/1000000000000779000000CF7E97E70A.png" xlink:type="simple" xlink:show="embed" xlink:actuate="onLoad" draw:mime-type="image/png"/></draw:frame></text:span></text:p>
              <text:p text:style-name="P8" loext:marker-style-name="T1"><text:span text:style-name="T10"/></text:p>
            </text:list-item>
            <text:list-item>
              <text:p text:style-name="P3" loext:marker-style-name="T1"><text:span text:style-name="T5">E</text:span><text:span text:style-name="annotation_20_reference"><text:span text:style-name="T5">nter the project name a</text:span></text:span><text:span text:style-name="T5">s</text:span><text:span text:style-name="T5"> </text:span><text:span text:style-name="T7">1_B</text:span><text:span text:style-name="T5">uild</text:span><text:span text:style-name="T7">P</text:span><text:span text:style-name="T5">roject, select the Freestyle project option, and click on OK</text:span></text:p>
              <text:p text:style-name="P3" loext:marker-style-name="T1"><text:span text:style-name="T5"/></text:p>
            </text:list-item>
          </text:list>
        </text:list-item>
      </text:list>
      <text:p text:style-name="P4" loext:marker-style-name="T1"><text:span text:style-name="T5"><draw:frame draw:style-name="fr3" draw:name="Image8" text:anchor-type="as-char" svg:width="6.1929in" svg:height="1.5736in" draw:z-index="9"><draw:image xlink:href="Pictures/1000000000000780000001E868CB3362.png" xlink:type="simple" xlink:show="embed" xlink:actuate="onLoad" draw:mime-type="image/png"/></draw:frame></text:span></text:p>
      <text:p text:style-name="P4" loext:marker-style-name="T1"><text:span text:style-name="T5"/></text:p>
      <text:p text:style-name="P10" loext:marker-style-name="T14"><text:span text:style-name="T13">Step 3: </text:span><text:span text:style-name="T14">Configure Git in Jenkins</text:span></text:p>
      <text:p text:style-name="P10" loext:marker-style-name="T14"><text:span text:style-name="T14"/></text:p>
      <text:list text:style-name="WWNum15">
        <text:list-item>
          <text:list>
            <text:list-header>
              <text:p text:style-name="P1" loext:marker-style-name="T1"><text:span text:style-name="T3"><text:s/></text:span><text:span text:style-name="T4">3.1 </text:span><text:span text:style-name="T3">Navigate to the General section, select This project is parameterized, click on Add Parameter, and select Credentials Parameter</text:span></text:p>
              <text:p text:style-name="P1" loext:marker-style-name="T1"><text:span text:style-name="T3"/></text:p>
            </text:list-header>
          </text:list>
        </text:list-item>
      </text:list>
      <text:p text:style-name="P4" loext:marker-style-name="T1"><text:span text:style-name="T3"><draw:frame draw:style-name="fr3" draw:name="Image9" text:anchor-type="as-char" svg:width="6.1929in" svg:height="2.3362in" draw:z-index="10"><draw:image xlink:href="Pictures/100000000000076E000002CEACECD89C.png" xlink:type="simple" xlink:show="embed" xlink:actuate="onLoad" draw:mime-type="image/png"/></draw:frame></text:span></text:p>
      <text:list text:continue-numbering="true" text:style-name="WWNum15">
        <text:list-item>
          <text:list>
            <text:list-header>
              <text:p text:style-name="P1" loext:marker-style-name="T1"><draw:frame draw:style-name="fr1" draw:name="Image10" text:anchor-type="char" svg:width="6.4429in" svg:height="2.7819in" draw:z-index="14"><draw:image xlink:href="Pictures/100000000000077E0000033CB4ED3A18.png" xlink:type="simple" xlink:show="embed" xlink:actuate="onLoad" draw:mime-type="image/png"/></draw:frame><text:soft-page-break/><text:span text:style-name="T4">3.2 </text:span><text:span text:style-name="T3">Add Name as Git, select Username with password as the Credential type, and then choose your created credentials as the Default value</text:span></text:p>
              <text:p text:style-name="P1" loext:marker-style-name="T1"><text:span text:style-name="T3"/></text:p>
              <text:p text:style-name="P1" loext:marker-style-name="T1"><text:span text:style-name="T3"><draw:frame draw:style-name="fr3" draw:name="Image11" text:anchor-type="as-char" svg:width="6.4429in" svg:height="2.7819in" draw:z-index="11"><draw:image xlink:href="Pictures/100000000000077E0000033CB4ED3A18.png" xlink:type="simple" xlink:show="embed" xlink:actuate="onLoad" draw:mime-type="image/png"/></draw:frame></text:span></text:p>
            </text:list-header>
          </text:list>
        </text:list-item>
      </text:list>
      <text:p text:style-name="P4" loext:marker-style-name="T1"><text:span text:style-name="T3"/></text:p>
      <text:list text:continue-numbering="true" text:style-name="WWNum15">
        <text:list-item>
          <text:list>
            <text:list-header>
              <text:p text:style-name="P2" loext:marker-style-name="T3"><text:span text:style-name="T4">3.3 </text:span><text:span text:style-name="T3">Navigate to the Source Code Management section, provide the GitHub Repository URL, select the added GitHub credentials, and click Apply and Save </text:span></text:p>
              <text:p text:style-name="P1" loext:marker-style-name="T3"><text:span text:style-name="T3"/></text:p>
              <text:p text:style-name="P1" loext:marker-style-name="T3"><text:span text:style-name="T3"><draw:frame draw:style-name="fr3" draw:name="Image12" text:anchor-type="as-char" svg:width="6.4429in" svg:height="3.0063in" draw:z-index="12"><draw:image xlink:href="Pictures/100000000000078000000380949882B2.png" xlink:type="simple" xlink:show="embed" xlink:actuate="onLoad" draw:mime-type="image/png"/></draw:frame></text:span></text:p>
              <text:p text:style-name="P2" loext:marker-style-name="T3"><text:soft-page-break/><text:span text:style-name="T4">3.4 </text:span><text:span text:style-name="T3">In the Jenkins dashboard, click on Build with Parameters under the Status, then click on Build</text:span></text:p>
              <text:p text:style-name="P1" loext:marker-style-name="T3"><text:span text:style-name="T3"><draw:frame draw:style-name="fr3" draw:name="Image13" text:anchor-type="as-char" svg:width="6.4429in" svg:height="2.2543in" draw:z-index="13"><draw:image xlink:href="Pictures/100000000000076E0000029A678BFD16.png" xlink:type="simple" xlink:show="embed" xlink:actuate="onLoad" draw:mime-type="image/png"/></draw:frame></text:span></text:p>
              <text:p text:style-name="P1" loext:marker-style-name="T3"><text:span text:style-name="T3"/></text:p>
              <text:p text:style-name="P2" loext:marker-style-name="T3"><text:span text:style-name="T4">3.5 </text:span><text:span text:style-name="T3">Click on Console Output to see the output </text:span></text:p>
              <text:p text:style-name="P1" loext:marker-style-name="T3"><text:span text:style-name="T3"/></text:p>
              <text:p text:style-name="P1" loext:marker-style-name="T3"><text:span text:style-name="T3"><draw:frame draw:style-name="fr3" draw:name="Image14" text:anchor-type="as-char" svg:width="6.4429in" svg:height="2.9563in" draw:z-index="1"><draw:image xlink:href="Pictures/100000000000076A000003671F872ED6.png" xlink:type="simple" xlink:show="embed" xlink:actuate="onLoad" draw:mime-type="image/png"/></draw:frame></text:span></text:p>
            </text:list-header>
          </text:list>
        </text:list-item>
      </text:list>
      <text:p text:style-name="P7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3" style:family="paragraph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language="en" fo:country="U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ListLabel_20_55" style:display-name="ListLabel 55" style:family="text">
      <style:text-properties fo:font-size="12pt" fo:font-weight="normal" style:font-size-asian="12pt" style:font-weight-asian="normal" style:font-size-complex="12pt" style:font-weight-complex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27" style:display-name="ListLabel 127" style:family="text">
      <style:text-properties fo:font-weight="normal" style:font-weight-asian="normal"/>
    </style:style>
    <style:style style:name="ListLabel_20_128" style:display-name="ListLabel 128" style:family="text">
      <style:text-properties fo:font-weight="normal" style:font-weight-asian="normal"/>
    </style:style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>
      <style:text-properties fo:font-weight="normal" style:font-weight-asian="normal"/>
    </style:style>
    <style:style style:name="ListLabel_20_131" style:display-name="ListLabel 131" style:family="text">
      <style:text-properties fo:font-weight="normal" style:font-weight-asian="normal"/>
    </style:style>
    <style:style style:name="ListLabel_20_132" style:display-name="ListLabel 132" style:family="text">
      <style:text-properties fo:font-weight="normal" style:font-weight-asian="normal"/>
    </style:style>
    <style:style style:name="ListLabel_20_133" style:display-name="ListLabel 133" style:family="text">
      <style:text-properties fo:font-weight="normal" style:font-weight-asian="normal"/>
    </style:style>
    <style:style style:name="ListLabel_20_134" style:display-name="ListLabel 134" style:family="text">
      <style:text-properties fo:font-weight="normal" style:font-weight-asian="normal"/>
    </style:style>
    <style:style style:name="ListLabel_20_135" style:display-name="ListLabel 135" style:family="text">
      <style:text-properties fo:font-weight="normal" style:font-weight-asian="normal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20:12:55.932440475</meta:creation-date>
    <dc:date>2026-05-16T20:18:39.964575215</dc:date>
    <meta:editing-duration>PT5M44S</meta:editing-duration>
    <meta:editing-cycles>1</meta:editing-cycles>
    <meta:document-statistic meta:table-count="0" meta:image-count="15" meta:object-count="0" meta:page-count="5" meta:paragraph-count="31" meta:word-count="209" meta:character-count="1247" meta:non-whitespace-character-count="1048"/>
    <meta:generator>LibreOffice/24.2.7.2$Linux_X86_64 LibreOffice_project/420$Build-2</meta:generator>
  </office:meta>
</office:document-meta>
</file>