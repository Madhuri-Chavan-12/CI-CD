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B000002B457F84B9D.png" manifest:media-type="image/png"/>
  <manifest:file-entry manifest:full-path="Pictures/10000000000004810000023005B57FDD.png" manifest:media-type="image/png"/>
  <manifest:file-entry manifest:full-path="Pictures/1000000000000744000003394D7B1BFF.png" manifest:media-type="image/png"/>
  <manifest:file-entry manifest:full-path="Pictures/100000000000077000000382DF072C6B.png" manifest:media-type="image/png"/>
  <manifest:file-entry manifest:full-path="Pictures/100000000000078000000383C7CAC680.png" manifest:media-type="image/png"/>
  <manifest:file-entry manifest:full-path="Pictures/1000000000000770000003849099841A.png" manifest:media-type="image/png"/>
  <manifest:file-entry manifest:full-path="Pictures/10000000000007640000038BC09BBEB8.png" manifest:media-type="image/png"/>
  <manifest:file-entry manifest:full-path="Pictures/100000000000077D00000386A147A5E0.png" manifest:media-type="image/png"/>
  <manifest:file-entry manifest:full-path="Pictures/1000000000000768000001D15B6703EE.png" manifest:media-type="image/png"/>
  <manifest:file-entry manifest:full-path="Pictures/10000000000007850000019FBC7C1504.png" manifest:media-type="image/png"/>
  <manifest:file-entry manifest:full-path="Pictures/1000000000000780000002F40C59B0DD.png" manifest:media-type="image/png"/>
  <manifest:file-entry manifest:full-path="Pictures/1000000000000765000003579560EE5F.png" manifest:media-type="image/png"/>
  <manifest:file-entry manifest:full-path="Pictures/1000000000000779000003966BC64B0A.png" manifest:media-type="image/png"/>
  <manifest:file-entry manifest:full-path="Pictures/100000000000067F0000037515791749.png" manifest:media-type="image/png"/>
  <manifest:file-entry manifest:full-path="Pictures/10000000000006FB000002C2E1BE9EEB.png" manifest:media-type="image/png"/>
  <manifest:file-entry manifest:full-path="Pictures/100000000000077E00000261E6AD9BF0.png" manifest:media-type="image/png"/>
  <manifest:file-entry manifest:full-path="Pictures/100000000000077C0000037FC24C50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officeooo:paragraph-rsid="0007bb98"/>
    </style:style>
    <style:style style:name="P2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07bb98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3" style:family="paragraph" style:parent-style-name="List_20_Paragraph">
      <style:text-properties fo:color="#404040" loext:opacity="100%" style:font-name="Calibri" fo:font-size="12pt" officeooo:paragraph-rsid="0007bb98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List_20_Paragraph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07bb98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List_20_Paragraph" style:list-style-name="WWNum3">
      <style:paragraph-properties fo:line-height="100%" fo:padding="0in" fo:border="none" style:shadow="none" style:join-border="false"/>
      <style:text-properties officeooo:paragraph-rsid="0007bb98"/>
    </style:style>
    <style:style style:name="P6" style:family="paragraph" style:parent-style-name="List_20_Paragraph">
      <style:paragraph-properties fo:line-height="100%" fo:padding="0in" fo:border="none" style:shadow="none" style:join-border="false"/>
      <style:text-properties officeooo:paragraph-rsid="0007bb98"/>
    </style:style>
    <style:style style:name="P7" style:family="paragraph" style:parent-style-name="List_20_Paragraph" style:list-style-name="WWNum4">
      <style:paragraph-properties fo:line-height="100%" fo:padding="0in" fo:border="none" style:shadow="none" style:join-border="false"/>
      <style:text-properties officeooo:paragraph-rsid="0007bb98"/>
    </style:style>
    <style:style style:name="P8" style:family="paragraph" style:parent-style-name="List_20_Paragraph" style:list-style-name="WWNum5">
      <style:paragraph-properties fo:line-height="100%" fo:padding="0in" fo:border="none" style:shadow="none" style:join-border="false"/>
      <style:text-properties officeooo:paragraph-rsid="0007bb98"/>
    </style:style>
    <style:style style:name="P9" style:family="paragraph" style:parent-style-name="List_20_Paragraph">
      <style:text-properties officeooo:paragraph-rsid="0007bb98"/>
    </style:style>
    <style:style style:name="P10" style:family="paragraph" style:parent-style-name="Standard">
      <style:paragraph-properties fo:text-align="center" style:justify-single-word="false"/>
      <style:text-properties officeooo:paragraph-rsid="0007bb98"/>
    </style:style>
    <style:style style:name="P11" style:family="paragraph" style:parent-style-name="Standard">
      <style:paragraph-properties fo:text-align="center" style:justify-single-word="false"/>
      <style:text-properties fo:color="#404040" loext:opacity="100%" style:font-name="Calibri" fo:font-size="12pt" fo:font-weight="bold" officeooo:paragraph-rsid="0007bb98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fo:font-weight="bold" officeooo:paragraph-rsid="0007bb98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>
      <style:text-properties fo:color="#404040" loext:opacity="100%" style:font-name="Calibri" fo:font-size="12pt" fo:font-weight="bold" officeooo:paragraph-rsid="0007bb98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07bb98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Standard">
      <style:paragraph-properties fo:line-height="100%" fo:padding="0in" fo:border="none" style:shadow="none" style:join-border="false"/>
      <style:text-properties officeooo:paragraph-rsid="0007bb98"/>
    </style:style>
    <style:style style:name="P16" style:family="paragraph" style:parent-style-name="Text_20_body">
      <style:paragraph-properties fo:line-height="100%" fo:padding="0in" fo:border="none" style:shadow="none" style:join-border="false"/>
      <style:text-properties officeooo:paragraph-rsid="0007bb98"/>
    </style:style>
    <style:style style:name="T1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2pt" fo:font-weight="bold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style:font-name-asian="Calibri1" style:font-size-asian="12pt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Setting up Snyk for SAST in Jenkins</text:span></text:p>
      <text:p text:style-name="P11" loext:marker-style-name="T2"/>
      <text:p text:style-name="P13"/>
      <text:p text:style-name="P15" loext:marker-style-name="T6"><text:span text:style-name="T6">Step 1: Configure Snyk as a SAST scan tool</text:span></text:p>
      <text:p text:style-name="P12" loext:marker-style-name="T2"/>
      <text:list text:style-name="WWNum2">
        <text:list-item>
          <text:p text:style-name="P1" loext:marker-style-name="T4"><text:span text:style-name="T4">Visit </text:span><text:span text:style-name="T2">https://snyk.io/</text:span><text:span text:style-name="T4">, sign up for a new Snyk account, and log in</text:span></text:p>
          <text:p text:style-name="P1" loext:marker-style-name="T4"><text:span text:style-name="T4">Navigate to </text:span><text:span text:style-name="T2">Integrations</text:span><text:span text:style-name="T4"> and select </text:span><text:span text:style-name="T2">Jenkins</text:span></text:p>
        </text:list-item>
      </text:list>
      <text:p text:style-name="P3" loext:marker-style-name="T4"/>
      <text:p text:style-name="P9" loext:marker-style-name="T4"/>
      <text:p text:style-name="P9" loext:marker-style-name="T4"><draw:frame draw:style-name="fr1" draw:name="Image1" text:anchor-type="as-char" svg:width="6.1929in" svg:height="2.9181in" draw:z-index="0"><draw:image xlink:href="Pictures/100000000000077000000382DF072C6B.png" xlink:type="simple" xlink:show="embed" xlink:actuate="onLoad" draw:mime-type="image/png"/></draw:frame></text:p>
      <text:p text:style-name="P9" loext:marker-style-name="T4"/>
      <text:p text:style-name="P9" loext:marker-style-name="T4"><draw:frame draw:style-name="fr1" draw:name="Image2" text:anchor-type="as-char" svg:width="6.1929in" svg:height="2.9673in" draw:z-index="1"><draw:image xlink:href="Pictures/10000000000007640000038BC09BBEB8.png" xlink:type="simple" xlink:show="embed" xlink:actuate="onLoad" draw:mime-type="image/png"/></draw:frame></text:p>
      <text:p text:style-name="P3" loext:marker-style-name="T4"/>
      <text:p text:style-name="P9" loext:marker-style-name="T4"><text:span text:style-name="T4">This will direct you to the documentation for integrating Snyk with Jenkins.</text:span></text:p>
      <text:p text:style-name="P3" loext:marker-style-name="T4"/>
      <text:p text:style-name="P9" loext:marker-style-name="T4"/>
      <text:p text:style-name="P12" loext:marker-style-name="T2"><text:soft-page-break/><draw:frame draw:style-name="fr2" draw:name="Image3" text:anchor-type="as-char" svg:width="6.6929in" svg:height="3.1457in" draw:z-index="2"><draw:image xlink:href="Pictures/100000000000077D00000386A147A5E0.png" xlink:type="simple" xlink:show="embed" xlink:actuate="onLoad" draw:mime-type="image/png"/></draw:frame></text:p>
      <text:p text:style-name="P12" loext:marker-style-name="T2"/>
      <text:p text:style-name="P15" loext:marker-style-name="T6"><text:span text:style-name="T6">Step 2: <text:s/>Create and configure a Jenkins job for Snyk integration</text:span></text:p>
      <text:p text:style-name="P12" loext:marker-style-name="T2"/>
      <text:list text:style-name="WWNum3">
        <text:list-item>
          <text:p text:style-name="P5" loext:marker-style-name="T4"><text:span text:style-name="T4">Open Jenkins and log in to the Jenkins account:</text:span></text:p>
          <text:p text:style-name="P5" loext:marker-style-name="T4"><text:span text:style-name="T4">To install the Snyk plugin, navigate to </text:span><text:span text:style-name="T2">Manage Jenkins</text:span><text:span text:style-name="T4"> and click </text:span><text:span text:style-name="T2">Available Plugins</text:span><text:span text:style-name="T4">, search for </text:span><text:span text:style-name="T2">Snyk Security </text:span><text:span text:style-name="T4">plugin, and then click </text:span><text:span text:style-name="T2">Install</text:span></text:p>
        </text:list-item>
      </text:list>
      <text:p text:style-name="P4" loext:marker-style-name="T2"/>
      <text:p text:style-name="P6" loext:marker-style-name="T4"><draw:frame draw:style-name="fr1" draw:name="Image4" text:anchor-type="as-char" svg:width="6.1929in" svg:height="1.3335in" draw:z-index="3"><draw:image xlink:href="Pictures/10000000000007850000019FBC7C1504.png" xlink:type="simple" xlink:show="embed" xlink:actuate="onLoad" draw:mime-type="image/png"/></draw:frame></text:p>
      <text:p text:style-name="P2" loext:marker-style-name="T4"/>
      <text:list text:continue-numbering="true" text:style-name="WWNum3">
        <text:list-item>
          <text:p text:style-name="P5" loext:marker-style-name="T4"><text:span text:style-name="T4">To configure Maven and Snyk in the </text:span><text:span text:style-name="T2">Global Tool Configuration</text:span><text:span text:style-name="T4">,</text:span><text:span text:style-name="T2"> </text:span><text:span text:style-name="T4">click on </text:span><text:span text:style-name="T2">Tools </text:span><text:span text:style-name="T4">inside</text:span><text:span text:style-name="T2"> Manage Jenkins</text:span></text:p>
          <text:p text:style-name="P5" loext:marker-style-name="T4"><text:span text:style-name="T4">To add Maven, click on </text:span><text:span text:style-name="T2">Add Maven</text:span><text:span text:style-name="T4"> under </text:span><text:span text:style-name="T2">Maven installations </text:span><text:span text:style-name="T4">and enter</text:span><text:span text:style-name="T2"> Maven</text:span><text:span text:style-name="T4"> as the </text:span><text:span text:style-name="T2">Name</text:span></text:p>
        </text:list-item>
      </text:list>
      <text:p text:style-name="P4" loext:marker-style-name="T2"/>
      <text:p text:style-name="P6" loext:marker-style-name="T4"/>
      <text:p text:style-name="P2" loext:marker-style-name="T4"><text:soft-page-break/><draw:frame draw:style-name="fr1" draw:name="Image5" text:anchor-type="as-char" svg:width="6.1929in" svg:height="2.8984in" draw:z-index="4"><draw:image xlink:href="Pictures/100000000000078000000383C7CAC680.png" xlink:type="simple" xlink:show="embed" xlink:actuate="onLoad" draw:mime-type="image/png"/></draw:frame></text:p>
      <text:p text:style-name="P2" loext:marker-style-name="T4"/>
      <text:p text:style-name="P2" loext:marker-style-name="T4"/>
      <text:list text:continue-numbering="true" text:style-name="WWNum3">
        <text:list-item>
          <text:p text:style-name="P5" loext:marker-style-name="T4"><text:span text:style-name="T4">To add Snyk, click on</text:span><text:span text:style-name="T2"> Add Snyk</text:span><text:span text:style-name="T4"> under </text:span><text:span text:style-name="T2">Snyk Installations, </text:span><text:span text:style-name="T4">add</text:span><text:span text:style-name="T2"> Name</text:span><text:span text:style-name="T4"> as</text:span><text:span text:style-name="T2"> Synk, </text:span><text:span text:style-name="T4">and click</text:span><text:span text:style-name="T2"> </text:span><text:span text:style-name="T4">on</text:span><text:span text:style-name="T2"> </text:span><text:span text:style-name="T4">the</text:span><text:span text:style-name="T2"> Save </text:span><text:span text:style-name="T4">button</text:span></text:p>
        </text:list-item>
      </text:list>
      <text:p text:style-name="P4" loext:marker-style-name="T2"/>
      <text:p text:style-name="P2" loext:marker-style-name="T4"/>
      <text:p text:style-name="P4" loext:marker-style-name="T2"><draw:frame draw:style-name="fr1" draw:name="Image6" text:anchor-type="as-char" svg:width="6.1929in" svg:height="2.4382in" draw:z-index="5"><draw:image xlink:href="Pictures/1000000000000780000002F40C59B0DD.png" xlink:type="simple" xlink:show="embed" xlink:actuate="onLoad" draw:mime-type="image/png"/></draw:frame></text:p>
      <text:p text:style-name="P12" loext:marker-style-name="T2"/>
      <text:p text:style-name="P12" loext:marker-style-name="T2"/>
      <text:p text:style-name="P15" loext:marker-style-name="T6"><text:span text:style-name="T6">Step 3: <text:s/>Manage Snyk API and Jenkins credentials</text:span></text:p>
      <text:p text:style-name="P12" loext:marker-style-name="T2"/>
      <text:list text:style-name="WWNum4">
        <text:list-item>
          <text:p text:style-name="P7" loext:marker-style-name="T4"><text:span text:style-name="T4">To retrieve your Snyk API token, go to </text:span><text:span text:style-name="T2">Account Settings</text:span><text:span text:style-name="T4"> in your Snyk account, click on </text:span><text:span text:style-name="T2">Click to show</text:span><text:span text:style-name="T4"> under the Auth Token key field, and copy the token for further reference</text:span></text:p>
        </text:list-item>
      </text:list>
      <text:p text:style-name="P2" loext:marker-style-name="T4"><text:soft-page-break/><draw:frame draw:style-name="fr1" draw:name="Image7" text:anchor-type="as-char" svg:width="6.1929in" svg:height="2.9689in" draw:z-index="6"><draw:image xlink:href="Pictures/1000000000000779000003966BC64B0A.png" xlink:type="simple" xlink:show="embed" xlink:actuate="onLoad" draw:mime-type="image/png"/></draw:frame></text:p>
      <text:p text:style-name="P2" loext:marker-style-name="T4"/>
      <text:p text:style-name="P2" loext:marker-style-name="T4"><draw:frame draw:style-name="fr1" draw:name="Image8" text:anchor-type="as-char" svg:width="6.1929in" svg:height="3.2953in" draw:z-index="7"><draw:image xlink:href="Pictures/100000000000067F0000037515791749.png" xlink:type="simple" xlink:show="embed" xlink:actuate="onLoad" draw:mime-type="image/png"/></draw:frame></text:p>
      <text:p text:style-name="P6" loext:marker-style-name="T4"/>
      <text:p text:style-name="P2" loext:marker-style-name="T4"/>
      <text:list text:continue-numbering="true" text:style-name="WWNum4">
        <text:list-item>
          <text:p text:style-name="P7" loext:marker-style-name="T4"><text:span text:style-name="T4">In the Jenkins interface, go to </text:span><text:span text:style-name="T2">Manage Jenkins, </text:span><text:span text:style-name="T4">select</text:span><text:span text:style-name="T2"> Security</text:span><text:span text:style-name="T4">,</text:span><text:span text:style-name="T2"> </text:span><text:span text:style-name="T4">then</text:span><text:span text:style-name="T2"> </text:span><text:span text:style-name="T4">choose </text:span><text:span text:style-name="T2">Credentials</text:span><text:span text:style-name="T4"> and select </text:span><text:span text:style-name="T2">global </text:span><text:span text:style-name="T4">to add global credentials</text:span></text:p>
          <text:p text:style-name="P7" loext:marker-style-name="T4"><text:span text:style-name="T4"/></text:p>
        </text:list-item>
      </text:list>
      <text:p text:style-name="P2" loext:marker-style-name="T4"><draw:frame draw:style-name="fr1" draw:name="Image9" text:anchor-type="as-char" svg:width="6.1929in" svg:height="1.5193in" draw:z-index="8"><draw:image xlink:href="Pictures/1000000000000768000001D15B6703EE.png" xlink:type="simple" xlink:show="embed" xlink:actuate="onLoad" draw:mime-type="image/png"/></draw:frame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list text:continue-numbering="true" text:style-name="WWNum4">
        <text:list-item>
          <text:p text:style-name="P7" loext:marker-style-name="T4"><text:soft-page-break/><text:span text:style-name="T4">Click on </text:span><text:span text:style-name="T2">Add Credentials</text:span><text:span text:style-name="T4">, select the </text:span><text:span text:style-name="T2">Snyk API token</text:span><text:span text:style-name="T4"> from the </text:span><text:span text:style-name="T2">Kind</text:span><text:span text:style-name="T4"> field, paste the copied token from step 3.1 into the </text:span><text:span text:style-name="T2">Token</text:span><text:span text:style-name="T4"> field, and then click the </text:span><text:span text:style-name="T2">Create</text:span><text:span text:style-name="T4"> button</text:span></text:p>
        </text:list-item>
      </text:list>
      <text:p text:style-name="P12" loext:marker-style-name="T2"/>
      <text:p text:style-name="P12" loext:marker-style-name="T2"><draw:frame draw:style-name="fr2" draw:name="Image10" text:anchor-type="as-char" svg:width="6.6929in" svg:height="2.6437in" draw:z-index="9"><draw:image xlink:href="Pictures/10000000000006FB000002C2E1BE9EEB.png" xlink:type="simple" xlink:show="embed" xlink:actuate="onLoad" draw:mime-type="image/png"/></draw:frame></text:p>
      <text:p text:style-name="P12" loext:marker-style-name="T2"/>
      <text:p text:style-name="P15" loext:marker-style-name="T6"><text:span text:style-name="T6">Step 4: <text:s/>Configure the Jenkins job for scanning</text:span></text:p>
      <text:p text:style-name="P12" loext:marker-style-name="T2"/>
      <text:list text:style-name="WWNum5">
        <text:list-item>
          <text:p text:style-name="P8" loext:marker-style-name="T4"><text:span text:style-name="T4">To create a new Jenkins job, click on </text:span><text:span text:style-name="T2">New Item</text:span><text:span text:style-name="T4">, enter the item name as </text:span><text:span text:style-name="T2">CodeScanSnyk</text:span><text:span text:style-name="T4">, select </text:span><text:span text:style-name="T2">Freestyle project</text:span><text:span text:style-name="T4">, and then click </text:span><text:span text:style-name="T2">OK</text:span></text:p>
        </text:list-item>
      </text:list>
      <text:p text:style-name="P2" loext:marker-style-name="T4"><draw:frame draw:style-name="fr1" draw:name="Image11" text:anchor-type="as-char" svg:width="6.1929in" svg:height="2.9272in" draw:z-index="10"><draw:image xlink:href="Pictures/1000000000000770000003849099841A.png" xlink:type="simple" xlink:show="embed" xlink:actuate="onLoad" draw:mime-type="image/png"/></draw:frame></text:p>
      <text:p text:style-name="P2" loext:marker-style-name="T4"/>
      <text:p text:style-name="P2" loext:marker-style-name="T4"/>
      <text:list text:continue-numbering="true" text:style-name="WWNum5">
        <text:list-item>
          <text:p text:style-name="P8" loext:marker-style-name="T4"><text:span text:style-name="T4">After creating a job, go to </text:span><text:span text:style-name="T2">Source Code Management</text:span><text:span text:style-name="T4"> and enter the GitHub repository URL. Then, under </text:span><text:span text:style-name="T2">Build Steps</text:span><text:span text:style-name="T4">, add the build step </text:span><text:span text:style-name="T2">Invoke Snyk Security task</text:span><text:span text:style-name="T4"> with the name </text:span><text:span text:style-name="T2">SnykToken</text:span><text:span text:style-name="T4">. Finally, click the </text:span><text:span text:style-name="T2">Save</text:span><text:span text:style-name="T4"> button to create the build.</text:span></text:p>
        </text:list-item>
      </text:list>
      <text:p text:style-name="P2" loext:marker-style-name="T4"/>
      <text:p text:style-name="P6" loext:marker-style-name="T4"><text:soft-page-break/><draw:frame draw:style-name="fr1" draw:name="Image12" text:anchor-type="as-char" svg:width="6.1929in" svg:height="2.7953in" draw:z-index="11"><draw:image xlink:href="Pictures/1000000000000765000003579560EE5F.png" xlink:type="simple" xlink:show="embed" xlink:actuate="onLoad" draw:mime-type="image/png"/></draw:frame></text:p>
      <text:p text:style-name="P6" loext:marker-style-name="T4"/>
      <text:p text:style-name="P6" loext:marker-style-name="T4"><draw:frame draw:style-name="fr1" draw:name="Image13" text:anchor-type="as-char" svg:width="6.1929in" svg:height="2.8917in" draw:z-index="12"><draw:image xlink:href="Pictures/100000000000077C0000037FC24C5066.png" xlink:type="simple" xlink:show="embed" xlink:actuate="onLoad" draw:mime-type="image/png"/></draw:frame></text:p>
      <text:p text:style-name="P2" loext:marker-style-name="T4"/>
      <text:p text:style-name="P2" loext:marker-style-name="T4"/>
      <text:p text:style-name="P14" loext:marker-style-name="T4"><draw:frame draw:style-name="fr2" draw:name="Image14" text:anchor-type="as-char" svg:width="6.6929in" svg:height="2.9681in" draw:z-index="13"><draw:image xlink:href="Pictures/1000000000000744000003394D7B1BFF.png" xlink:type="simple" xlink:show="embed" xlink:actuate="onLoad" draw:mime-type="image/png"/></draw:frame></text:p>
      <text:p text:style-name="P14" loext:marker-style-name="T4"/>
      <text:p text:style-name="P6" loext:marker-style-name="T4"><text:span text:style-name="T4"/></text:p>
      <text:p text:style-name="P6" loext:marker-style-name="T4"><text:span text:style-name="T4"/></text:p>
      <text:list text:continue-numbering="true" text:style-name="WWNum5">
        <text:list-item>
          <text:p text:style-name="P8" loext:marker-style-name="T4"><text:soft-page-break/><text:span text:style-name="T4">To check the build status, click on the build link under </text:span><text:span text:style-name="T2">Permalinks. </text:span><text:span text:style-name="T4">After that, click on</text:span><text:span text:style-name="T2"> Console Output</text:span></text:p>
        </text:list-item>
      </text:list>
      <text:p text:style-name="P2" loext:marker-style-name="T4"/>
      <text:p text:style-name="P16" loext:marker-style-name="T4"><draw:frame draw:style-name="fr2" draw:name="Image15" text:anchor-type="as-char" svg:width="6.6929in" svg:height="3.0898in" draw:z-index="14"><draw:image xlink:href="Pictures/10000000000005DB000002B457F84B9D.png" xlink:type="simple" xlink:show="embed" xlink:actuate="onLoad" draw:mime-type="image/png"/></draw:frame></text:p>
      <text:p text:style-name="P6" loext:marker-style-name="T4"/>
      <text:p text:style-name="P2" loext:marker-style-name="T4"><draw:frame draw:style-name="fr1" draw:name="Image16" text:anchor-type="as-char" svg:width="6.1929in" svg:height="3.0075in" draw:z-index="15"><draw:image xlink:href="Pictures/10000000000004810000023005B57FDD.png" xlink:type="simple" xlink:show="embed" xlink:actuate="onLoad" draw:mime-type="image/png"/></draw:frame></text:p>
      <text:p text:style-name="P2" loext:marker-style-name="T4"/>
      <text:list text:continue-numbering="true" text:style-name="WWNum5">
        <text:list-item>
          <text:p text:style-name="P8" loext:marker-style-name="T2"><text:span text:style-name="T4">To navigate to the Snyk tool to review code, scan reports under the </text:span><text:span text:style-name="T2">Projects </text:span><text:span text:style-name="T4">section</text:span></text:p>
        </text:list-item>
      </text:list>
      <text:p text:style-name="P2" loext:marker-style-name="T4"/>
      <text:p text:style-name="P6" loext:marker-style-name="T4"><draw:frame draw:style-name="fr1" draw:name="Image17" text:anchor-type="as-char" svg:width="6.1929in" svg:height="1.9681in" draw:z-index="16"><draw:image xlink:href="Pictures/100000000000077E00000261E6AD9BF0.png" xlink:type="simple" xlink:show="embed" xlink:actuate="onLoad" draw:mime-type="image/png"/></draw:frame></text:p>
      <text:p text:style-name="P2" loext:marker-style-name="T4"/>
      <text:p text:style-name="P2" loext:marker-style-name="T4"/>
      <text:p text:style-name="P2" loext:marker-style-name="T4"><text:soft-page-break/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14" loext:marker-style-name="T4"/>
      <text:p text:style-name="P2" loext:marker-style-name="T4"/>
      <text:p text:style-name="P14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12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10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ListLabel_20_1" style:display-name="ListLabel 1" style:family="text">
      <style:text-properties fo:font-weight="normal" style:font-weight-asian="normal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normal" style:font-weight-asian="normal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2pt" fo:font-weight="normal" style:font-size-asian="12pt" style:font-weight-asian="normal" style:font-size-complex="12pt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fo:font-weight="normal" style:font-size-asian="12pt" style:font-weight-asian="normal" style:font-size-complex="12pt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2.%1%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3.%1%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4.%1%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22:23:17.289362837</meta:creation-date>
    <dc:date>2026-05-27T23:29:46.634962605</dc:date>
    <meta:editing-duration>PT15M29S</meta:editing-duration>
    <meta:editing-cycles>2</meta:editing-cycles>
    <meta:generator>LibreOffice/24.2.7.2$Linux_X86_64 LibreOffice_project/420$Build-2</meta:generator>
    <meta:document-statistic meta:table-count="0" meta:image-count="17" meta:object-count="0" meta:page-count="8" meta:paragraph-count="37" meta:word-count="346" meta:character-count="1986" meta:non-whitespace-character-count="1669"/>
  </office:meta>
</office:document-meta>
</file>