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C00000376145B8548.png" manifest:media-type="image/png"/>
  <manifest:file-entry manifest:full-path="Pictures/100000000000077C000001FC1ABD7238.png" manifest:media-type="image/png"/>
  <manifest:file-entry manifest:full-path="Pictures/10000000000007800000038123BC7A03.png" manifest:media-type="image/png"/>
  <manifest:file-entry manifest:full-path="Pictures/10000000000006230000028BA6393607.png" manifest:media-type="image/png"/>
  <manifest:file-entry manifest:full-path="Pictures/1000000000000339000000BACFDD2A4B.png" manifest:media-type="image/png"/>
  <manifest:file-entry manifest:full-path="Pictures/1000000000000770000003565D80B6B8.png" manifest:media-type="image/png"/>
  <manifest:file-entry manifest:full-path="Pictures/1000000000000585000000BFD80C9D66.png" manifest:media-type="image/png"/>
  <manifest:file-entry manifest:full-path="Pictures/10000000000007450000031215E2620C.png" manifest:media-type="image/png"/>
  <manifest:file-entry manifest:full-path="Pictures/100000000000070D0000020095EB7DF0.png" manifest:media-type="image/png"/>
  <manifest:file-entry manifest:full-path="Pictures/10000000000007730000030FB9A13E73.png" manifest:media-type="image/png"/>
  <manifest:file-entry manifest:full-path="Pictures/100000000000077E0000015ADD4475EE.png" manifest:media-type="image/png"/>
  <manifest:file-entry manifest:full-path="Pictures/100000000000076A00000382DD73AAF6.png" manifest:media-type="image/png"/>
  <manifest:file-entry manifest:full-path="Pictures/100000000000077F000001B881652B1C.png" manifest:media-type="image/png"/>
  <manifest:file-entry manifest:full-path="Pictures/100000000000077300000386C17E9A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8">
      <style:text-properties officeooo:paragraph-rsid="00100f66"/>
    </style:style>
    <style:style style:name="P2" style:family="paragraph" style:parent-style-name="List_20_Paragraph" style:list-style-name="WWNum24">
      <style:paragraph-properties fo:line-height="100%" fo:padding="0in" fo:border="none" style:shadow="none" style:join-border="false"/>
      <style:text-properties officeooo:paragraph-rsid="00100f66"/>
    </style:style>
    <style:style style:name="P3" style:family="paragraph" style:parent-style-name="List_20_Paragraph">
      <style:paragraph-properties fo:line-height="100%" fo:padding="0in" fo:border="none" style:shadow="none" style:join-border="false"/>
      <style:text-properties officeooo:paragraph-rsid="00100f66"/>
    </style:style>
    <style:style style:name="P4" style:family="paragraph" style:parent-style-name="List_20_Paragraph">
      <style:paragraph-properties fo:margin-left="0.4016in" fo:line-height="100%" fo:padding="0in" fo:border="none" style:shadow="none" style:join-border="false"/>
      <style:text-properties officeooo:paragraph-rsid="00100f66"/>
    </style:style>
    <style:style style:name="P5" style:family="paragraph" style:parent-style-name="List_20_Paragraph">
      <style:paragraph-properties fo:margin-left="0.4472in" fo:line-height="100%" fo:padding="0in" fo:border="none" style:shadow="none" style:join-border="false"/>
      <style:text-properties officeooo:paragraph-rsid="00100f66"/>
    </style:style>
    <style:style style:name="P6" style:family="paragraph" style:parent-style-name="List_20_Paragraph" style:list-style-name="WWNum18">
      <style:paragraph-properties fo:line-height="100%" fo:padding="0in" fo:border="none" style:shadow="none" style:join-border="false"/>
      <style:text-properties officeooo:paragraph-rsid="00100f66"/>
    </style:style>
    <style:style style:name="P7" style:family="paragraph" style:parent-style-name="List_20_Paragraph" style:list-style-name="WWNum19">
      <style:paragraph-properties fo:line-height="100%" fo:padding="0in" fo:border="none" style:shadow="none" style:join-border="false"/>
      <style:text-properties officeooo:paragraph-rsid="00100f66"/>
    </style:style>
    <style:style style:name="P8" style:family="paragraph" style:parent-style-name="List_20_Paragraph" style:list-style-name="WWNum27">
      <style:paragraph-properties fo:line-height="100%" fo:padding="0in" fo:border="none" style:shadow="none" style:join-border="false"/>
      <style:text-properties officeooo:paragraph-rsid="00100f66"/>
    </style:style>
    <style:style style:name="P9" style:family="paragraph" style:parent-style-name="List_20_Paragraph" style:list-style-name="WWNum27">
      <style:paragraph-properties fo:line-height="100%" fo:padding="0in" fo:border="none" style:shadow="none" style:join-border="false"/>
      <style:text-properties officeooo:paragraph-rsid="0017bf45"/>
    </style:style>
    <style:style style:name="P10" style:family="paragraph" style:parent-style-name="List_20_Paragraph">
      <style:paragraph-properties fo:margin-left="0.4472in" fo:margin-top="0.1665in" fo:margin-bottom="0.1665in" style:contextual-spacing="true" fo:line-height="100%" fo:padding="0in" fo:border="none" style:shadow="none" style:join-border="false">
        <style:tab-stops>
          <style:tab-stop style:position="1.861in"/>
          <style:tab-stop style:position="2.5909in"/>
          <style:tab-stop style:position="2.6173in"/>
        </style:tab-stops>
      </style:paragraph-properties>
      <style:text-properties officeooo:paragraph-rsid="00100f66"/>
    </style:style>
    <style:style style:name="P11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100f6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List_20_Paragraph">
      <style:paragraph-properties fo:margin-left="0.4472in" fo:line-height="100%" fo:padding="0in" fo:border="none" style:shadow="none" style:join-border="false"/>
      <style:text-properties fo:color="#404040" loext:opacity="100%" style:font-name="Calibri" fo:font-size="12pt" officeooo:paragraph-rsid="00100f6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List_20_Paragraph">
      <style:paragraph-properties fo:margin-left="0.4016in" fo:line-height="100%" fo:padding="0in" fo:border="none" style:shadow="none" style:join-border="false"/>
      <style:text-properties fo:color="#404040" loext:opacity="100%" style:font-name="Calibri" fo:font-size="12pt" officeooo:paragraph-rsid="00100f66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List_20_Paragraph">
      <style:paragraph-properties fo:margin-left="0.4016in"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6" style:family="paragraph" style:parent-style-name="List_20_Paragraph">
      <style:paragraph-properties fo:margin-left="0.4472in"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7" style:family="paragraph" style:parent-style-name="List_20_Paragraph" style:list-style-name="WWNum27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8" style:family="paragraph" style:parent-style-name="List_20_Paragraph">
      <style:paragraph-properties fo:margin-left="0.4472in" fo:line-height="100%" fo:padding="0in" fo:border="none" style:shadow="none" style:join-border="false"/>
      <style:text-properties fo:color="#404040" loext:opacity="100%" style:font-name="Calibri" fo:font-size="14pt" fo:font-weight="bold" officeooo:paragraph-rsid="00100f66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9" style:family="paragraph" style:parent-style-name="List_20_Paragraph">
      <style:paragraph-properties fo:margin-top="0in" fo:margin-bottom="0.111in" style:contextual-spacing="true" fo:line-height="106%"/>
      <style:text-properties officeooo:paragraph-rsid="00100f66"/>
    </style:style>
    <style:style style:name="P20" style:family="paragraph" style:parent-style-name="List_20_Paragraph">
      <style:text-properties officeooo:paragraph-rsid="00100f66"/>
    </style:style>
    <style:style style:name="P21" style:family="paragraph" style:parent-style-name="Standard" style:list-style-name="WWNum18">
      <style:text-properties officeooo:paragraph-rsid="0011faee"/>
    </style:style>
    <style:style style:name="P22" style:family="paragraph" style:parent-style-name="Standard" style:master-page-name="Standard">
      <style:paragraph-properties fo:text-align="center" style:justify-single-word="false" style:page-number="1"/>
      <style:text-properties officeooo:paragraph-rsid="00100f66"/>
    </style:style>
    <style:style style:name="P23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officeooo:paragraph-rsid="00100f66"/>
    </style:style>
    <style:style style:name="P24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25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6" style:family="paragraph" style:parent-style-name="Standard">
      <style:paragraph-properties fo:margin-left="-0.0984in"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7" style:family="paragraph" style:parent-style-name="Standard">
      <style:paragraph-properties fo:margin-left="-0.1972in"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8" style:family="paragraph" style:parent-style-name="Standard">
      <style:paragraph-properties fo:margin-left="-0.2957in"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29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100f66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30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100f66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31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4pt" fo:font-weight="bold" officeooo:paragraph-rsid="00100f66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32" style:family="paragraph" style:parent-style-name="Standard">
      <style:paragraph-properties fo:margin-left="-0.0984in" fo:line-height="100%" fo:padding="0in" fo:border="none" style:shadow="none" style:join-border="false"/>
      <style:text-properties officeooo:paragraph-rsid="00100f66"/>
    </style:style>
    <style:style style:name="P33" style:family="paragraph" style:parent-style-name="Standard">
      <style:paragraph-properties fo:margin-left="-0.1972in" fo:line-height="100%" fo:padding="0in" fo:border="none" style:shadow="none" style:join-border="false"/>
      <style:text-properties officeooo:paragraph-rsid="00100f66"/>
    </style:style>
    <style:style style:name="P34" style:family="paragraph" style:parent-style-name="Standard">
      <style:paragraph-properties fo:margin-left="-0.2957in" fo:line-height="100%" fo:padding="0in" fo:border="none" style:shadow="none" style:join-border="false"/>
      <style:text-properties officeooo:paragraph-rsid="00100f66"/>
    </style:style>
    <style:style style:name="P35" style:family="paragraph" style:parent-style-name="Standard">
      <style:paragraph-properties fo:line-height="100%"/>
      <style:text-properties officeooo:paragraph-rsid="00136f04"/>
    </style:style>
    <style:style style:name="P36" style:family="paragraph" style:parent-style-name="Standard">
      <style:paragraph-properties fo:line-height="100%"/>
      <style:text-properties officeooo:paragraph-rsid="0014fbd9"/>
    </style:style>
    <style:style style:name="T1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2pt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2pt" style:font-name-asian="Calibri1" style:font-size-asian="12pt" style:font-name-complex="Calibri1" style:font-size-complex="12pt" fo:background-color="#ffffff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2pt" style:font-name-asian="Calibri1" style:font-size-asian="12pt" style:font-name-complex="Calibri1" style:font-size-complex="12pt" fo:background-color="#ffffff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2pt" style:font-name-asian="Calibri1" style:font-size-asian="12pt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 fo:background-color="#ffffff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fo:background-color="#ffffff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404040" loext:opacity="100%" style:font-name="Calibri" fo:font-size="12pt" fo:font-weight="bold" fo:background-color="#ffff00" loext:char-shading-value="0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fo:color="#404040" loext:opacity="100%" style:font-name="Calibri" fo:font-size="12pt" fo:font-weight="bold" fo:background-color="#ffff00" loext:char-shading-value="0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color="#404040" loext:opacity="100%" style:font-name="Calibri" fo:font-size="12pt" fo:font-weight="bold" loext:char-shading-value="0" style:font-name-asian="Calibri1" style:font-size-asian="12pt" style:font-weight-asian="bold" style:font-name-complex="Calibri1" style:font-size-complex="12pt" style:font-weight-complex="bold" fo:background-color="#ffffff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color="#404040" loext:opacity="100%" style:font-name="Calibri" fo:font-size="12pt" fo:background-color="#ffff00" loext:char-shading-value="0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7" style:family="text">
      <style:text-properties fo:color="#404040" loext:opacity="100%" style:font-name="Calibri" fo:font-size="12pt" fo:background-color="#ffff00" loext:char-shading-value="0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8" style:family="text">
      <style:text-properties fo:color="#404040" loext:opacity="100%" style:font-name="Calibri" fo:font-size="12pt" fo:background-color="#ffff00" loext:char-shading-value="0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9" style:family="text">
      <style:text-properties fo:color="#404040" loext:opacity="100%" style:font-name="Calibri" fo:font-size="12pt" fo:background-color="#ffff00" loext:char-shading-value="0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0" style:family="text">
      <style:text-properties fo:color="#404040" loext:opacity="100%" style:font-name="Calibri" fo:font-size="12pt" loext:char-shading-value="0" style:font-name-asian="Calibri1" style:font-size-asian="12pt" style:font-name-complex="Calibri1" style:font-size-complex="12pt" fo:background-color="#ffffff">
        <loext:char-complex-color loext:theme-type="dark1" loext:color-type="theme">
          <loext:transformation loext:type="tint" loext:value="2509"/>
        </loext:char-complex-color>
      </style:text-properties>
    </style:style>
    <style:style style:name="T21" style:family="text">
      <style:text-properties fo:color="#404040" loext:opacity="100%" style:font-name="Calibri" fo:font-size="12pt" loext:char-shading-value="0" style:font-name-asian="Calibri1" style:font-size-asian="12pt" style:font-name-complex="Calibri1" style:font-size-complex="12pt" fo:background-color="#ffffff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4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5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26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7" style:family="text">
      <style:text-properties fo:color="#404040" loext:opacity="100%" style:font-name="Calibri" fo:font-size="14pt" style:font-name-asian="Calibri1" style:font-size-asian="14pt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8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 loext:marker-style-name="T22"><text:span text:style-name="T22"/></text:p>
      <text:p text:style-name="P23" loext:marker-style-name="T23"><text:span text:style-name="T23">Integrating Maven with Jenkins</text:span></text:p>
      <text:p text:style-name="P24" loext:marker-style-name="T10"/>
      <text:p text:style-name="P32" loext:marker-style-name="T25"><text:span text:style-name="T24">Step 1:</text:span><text:span text:style-name="T27"> </text:span><text:span text:style-name="T25">Install the Maven plugin</text:span></text:p>
      <text:p text:style-name="P25" loext:marker-style-name="T7"/>
      <text:list text:style-name="WWNum24">
        <text:list-item>
          <text:p text:style-name="P2" loext:marker-style-name="T2"><text:span text:style-name="T2">Click on the </text:span><text:span text:style-name="T10">Manage Jenkins</text:span><text:span text:style-name="T2"> option as shown in the screenshot below → Click on the </text:span><text:span text:style-name="T10">Plugins</text:span><text:span text:style-name="T2"> option as shown in the screenshot below → Click on </text:span><text:span text:style-name="T10">Installed plugins</text:span><text:span text:style-name="T2"> to verify whether the </text:span><text:span text:style-name="T10">Maven Integration plugin</text:span><text:span text:style-name="T2"> has been installed </text:span></text:p>
        </text:list-item>
      </text:list>
      <text:p text:style-name="P11" loext:marker-style-name="T2"/>
      <text:p text:style-name="P3" loext:marker-style-name="T2"><draw:frame draw:style-name="fr2" draw:name="Image1" text:anchor-type="as-char" svg:width="6.1929in" svg:height="2.861in" draw:z-index="0"><draw:image xlink:href="Pictures/100000000000077C00000376145B8548.png" xlink:type="simple" xlink:show="embed" xlink:actuate="onLoad" draw:mime-type="image/png"/></draw:frame></text:p>
      <text:p text:style-name="P3" loext:marker-style-name="T2"/>
      <text:p text:style-name="P3" loext:marker-style-name="T2"><draw:frame draw:style-name="fr2" draw:name="Image2" text:anchor-type="as-char" svg:width="6.1929in" svg:height="1.6417in" draw:z-index="1"><draw:image xlink:href="Pictures/100000000000077C000001FC1ABD7238.png" xlink:type="simple" xlink:show="embed" xlink:actuate="onLoad" draw:mime-type="image/png"/></draw:frame></text:p>
      <text:p text:style-name="P3" loext:marker-style-name="T2"/>
      <text:list text:continue-numbering="true" text:style-name="WWNum24">
        <text:list-item>
          <text:p text:style-name="P2" loext:marker-style-name="T2"><text:span text:style-name="T2">Use the following command to check the Maven version:</text:span></text:p>
        </text:list-item>
      </text:list>
      <text:p text:style-name="P19" loext:marker-style-name="T11"><text:span text:style-name="T11">mvn -version</text:span></text:p>
      <text:p text:style-name="P11" loext:marker-style-name="T2"/>
      <text:p text:style-name="P3" loext:marker-style-name="T2"><draw:frame draw:style-name="fr2" draw:name="Image3" text:anchor-type="as-char" svg:width="6.1929in" svg:height="1.3957in" draw:z-index="2"><draw:image xlink:href="Pictures/1000000000000339000000BACFDD2A4B.png" xlink:type="simple" xlink:show="embed" xlink:actuate="onLoad" draw:mime-type="image/png"/></draw:frame></text:p>
      <text:p text:style-name="P25" loext:marker-style-name="T2"/>
      <text:p text:style-name="P14" loext:marker-style-name="T7"/>
      <text:p text:style-name="P32" loext:marker-style-name="T24"><text:span text:style-name="T25"/></text:p>
      <text:p text:style-name="P32" loext:marker-style-name="T24"><text:span text:style-name="T25"/></text:p>
      <text:p text:style-name="P32" loext:marker-style-name="T24"><text:soft-page-break/><text:span text:style-name="T25">Step 2: </text:span><text:span text:style-name="T24">Set up Global Tool Configuration</text:span></text:p>
      <text:p text:style-name="P26" loext:marker-style-name="T7"/>
      <text:list text:style-name="WWNum18">
        <text:list-item>
          <text:p text:style-name="P6" loext:marker-style-name="T7"><text:span text:style-name="T1">Go to the Jenkins Dashboard, click on </text:span><text:span text:style-name="T7">Manage Jenkins</text:span><text:span text:style-name="T1">, and then select </text:span><text:span text:style-name="T7">Tools</text:span><text:span text:style-name="T1"> from the list of options</text:span></text:p>
        </text:list-item>
      </text:list>
      <text:p text:style-name="P14" loext:marker-style-name="T7"/>
      <text:p text:style-name="P3" loext:marker-style-name="T7"><draw:frame draw:style-name="fr2" draw:name="Image4" text:anchor-type="as-char" svg:width="6.1929in" svg:height="1.1154in" draw:z-index="3"><draw:image xlink:href="Pictures/100000000000077E0000015ADD4475EE.png" xlink:type="simple" xlink:show="embed" xlink:actuate="onLoad" draw:mime-type="image/png"/></draw:frame></text:p>
      <text:p text:style-name="P14" loext:marker-style-name="T7"/>
      <text:list text:continue-numbering="true" text:style-name="WWNum18">
        <text:list-item>
          <text:p text:style-name="P1" loext:marker-style-name="T1"><text:span text:style-name="T1">Click on </text:span><text:span text:style-name="T7">JDK installations</text:span><text:span text:style-name="T1"> and provide the </text:span><text:span text:style-name="T7">Name</text:span><text:span text:style-name="T1"> and </text:span><text:span text:style-name="T7">JAVA_HOME</text:span><text:span text:style-name="T1"> path</text:span></text:p>
          <text:p text:style-name="P21" loext:marker-style-name="T7"><text:span text:style-name="T7">Note:</text:span><text:span text:style-name="T1"> Set the </text:span><text:span text:style-name="T7">JAVA_HOME</text:span><text:span text:style-name="T1"> environment variable to </text:span><text:span text:style-name="T7">/usr/lib/jvm/java-11-openjdk-amd64</text:span></text:p>
        </text:list-item>
      </text:list>
      <text:p text:style-name="P20" loext:marker-style-name="T1"><text:span text:style-name="T1"><draw:frame draw:style-name="fr2" draw:name="Image5" text:anchor-type="as-char" svg:width="6.1929in" svg:height="2.7752in" draw:z-index="4"><draw:image xlink:href="Pictures/1000000000000770000003565D80B6B8.png" xlink:type="simple" xlink:show="embed" xlink:actuate="onLoad" draw:mime-type="image/png"/></draw:frame></text:span></text:p>
      <text:p text:style-name="P20" loext:marker-style-name="T1"><text:span text:style-name="T1"/></text:p>
      <text:list text:continue-numbering="true" text:style-name="WWNum18">
        <text:list-item>
          <text:p text:style-name="P6" loext:marker-style-name="T7"><text:span text:style-name="T1">To configure Maven, click on the </text:span><text:span text:style-name="T7">Maven installations </text:span><text:span text:style-name="T1">button in the Maven section and enter a </text:span><text:span text:style-name="T7">Name</text:span><text:span text:style-name="T1"> and </text:span><text:span text:style-name="T7">MAVEN_HOME</text:span><text:span text:style-name="T1"> path</text:span></text:p>
        </text:list-item>
      </text:list>
      <text:p text:style-name="P35" loext:marker-style-name="T1"><text:span text:style-name="T7"><text:s text:c="11"/></text:span><text:span text:style-name="T14"><text:s text:c="4"/>Note</text:span><text:span text:style-name="T18">:</text:span><text:span text:style-name="T18"> </text:span><text:span text:style-name="T18">Set the </text:span><text:span text:style-name="T14">MAVEN_HOME</text:span><text:span text:style-name="T18"> environment variable to </text:span><text:span text:style-name="T14">/usr/share/maven</text:span></text:p>
      <text:p text:style-name="P3" loext:marker-style-name="T7"><draw:frame draw:style-name="fr2" draw:name="Image6" text:anchor-type="as-char" svg:width="6.1929in" svg:height="2.6154in" draw:z-index="5"><draw:image xlink:href="Pictures/10000000000007450000031215E2620C.png" xlink:type="simple" xlink:show="embed" xlink:actuate="onLoad" draw:mime-type="image/png"/></draw:frame></text:p>
      <text:p text:style-name="P3" loext:marker-style-name="T7"><text:span text:style-name="T1"/></text:p>
      <text:list text:continue-numbering="true" text:style-name="WWNum18">
        <text:list-item>
          <text:p text:style-name="P6" loext:marker-style-name="T7"><text:span text:style-name="T3">To configure Git, click on </text:span><text:span text:style-name="T12">Git</text:span><text:span text:style-name="T10"> installations</text:span><text:span text:style-name="T3"> and add the </text:span><text:span text:style-name="T12">Name</text:span><text:span text:style-name="T3"> and </text:span><text:span text:style-name="T12">Path to Git executable</text:span><text:span text:style-name="T3"> </text:span></text:p>
        </text:list-item>
      </text:list>
      <text:p text:style-name="P3" loext:marker-style-name="T7"><text:span text:style-name="T3"/></text:p>
      <text:p text:style-name="P36" loext:marker-style-name="T1"><text:span text:style-name="T8"><text:s text:c="13"/></text:span><text:span text:style-name="T14"><text:s/>Note</text:span><text:span text:style-name="T18">:</text:span><text:span text:style-name="T18"> </text:span><text:span text:style-name="T18">Set the </text:span><text:span text:style-name="T14">Path to Git executable </text:span><text:span text:style-name="T18">environment variable to </text:span><text:span text:style-name="T14">/bin/git </text:span><text:span text:style-name="T18">and click on</text:span><text:span text:style-name="T14"> Save</text:span></text:p>
      <text:p text:style-name="P3" loext:marker-style-name="T7"><text:span text:style-name="T3"/></text:p>
      <text:p text:style-name="P33" loext:marker-style-name="T24"><text:soft-page-break/><text:span text:style-name="T25"/></text:p>
      <text:p text:style-name="P33" loext:marker-style-name="T24"><text:span text:style-name="T25"><draw:frame draw:style-name="fr2" draw:name="Image7" text:anchor-type="as-char" svg:width="6.8902in" svg:height="2.828in" draw:z-index="6"><draw:image xlink:href="Pictures/10000000000007730000030FB9A13E73.png" xlink:type="simple" xlink:show="embed" xlink:actuate="onLoad" draw:mime-type="image/png"/></draw:frame></text:span></text:p>
      <text:p text:style-name="P33" loext:marker-style-name="T24"><text:span text:style-name="T25"/></text:p>
      <text:p text:style-name="P33" loext:marker-style-name="T24"><text:span text:style-name="T25"/></text:p>
      <text:p text:style-name="P33" loext:marker-style-name="T24"><text:span text:style-name="T25">Step 3: </text:span><text:span text:style-name="T24">Fork a sample repository</text:span></text:p>
      <text:p text:style-name="P27" loext:marker-style-name="T7"/>
      <text:list text:style-name="WWNum19">
        <text:list-item>
          <text:p text:style-name="P7" loext:marker-style-name="T1"><text:span text:style-name="T1">Log in to your GitHub account, navigate to </text:span><text:span text:style-name="T28">https://github.com/jenkins-docs/simple-java-maven-app</text:span><text:span text:style-name="Internet_20_link"><text:span text:style-name="T1">,</text:span></text:span><text:span text:style-name="T1"> and click on </text:span><text:span text:style-name="T7">Fork</text:span></text:p>
        </text:list-item>
      </text:list>
      <text:p text:style-name="P13" loext:marker-style-name="T1"/>
      <text:p text:style-name="P4" loext:marker-style-name="T1"><draw:frame draw:style-name="fr2" draw:name="Image8" text:anchor-type="as-char" svg:width="6.2917in" svg:height="2.9402in" draw:z-index="7"><draw:image xlink:href="Pictures/10000000000007800000038123BC7A03.png" xlink:type="simple" xlink:show="embed" xlink:actuate="onLoad" draw:mime-type="image/png"/></draw:frame></text:p>
      <text:p text:style-name="P30" loext:marker-style-name="T1"/>
      <text:list text:continue-numbering="true" text:style-name="WWNum19">
        <text:list-item>
          <text:p text:style-name="P7" loext:marker-style-name="T1"><text:span text:style-name="T1">Run </text:span><text:span text:style-name="T11">git clone [Forked REPO URL]</text:span><text:span text:style-name="T1"> in the terminal to clone the repository locally</text:span></text:p>
        </text:list-item>
      </text:list>
      <text:p text:style-name="P4" loext:marker-style-name="T1"><text:span text:style-name="T1"/></text:p>
      <text:p text:style-name="P15" loext:marker-style-name="T7"><draw:frame draw:style-name="fr2" draw:name="Image9" text:anchor-type="as-char" svg:width="6.2917in" svg:height="0.85in" draw:z-index="8"><draw:image xlink:href="Pictures/1000000000000585000000BFD80C9D66.png" xlink:type="simple" xlink:show="embed" xlink:actuate="onLoad" draw:mime-type="image/png"/></draw:frame></text:p>
      <text:p text:style-name="P15" loext:marker-style-name="T7"/>
      <text:p text:style-name="P34" loext:marker-style-name="T24"><text:span text:style-name="T25"/></text:p>
      <text:p text:style-name="P34" loext:marker-style-name="T24"><text:span text:style-name="T25"/></text:p>
      <text:p text:style-name="P34" loext:marker-style-name="T24"><text:span text:style-name="T25"/></text:p>
      <text:p text:style-name="P34" loext:marker-style-name="T24"><text:soft-page-break/><text:span text:style-name="T25">Step 4: </text:span><text:span text:style-name="T24">Integrate Maven with Jenkins</text:span></text:p>
      <text:p text:style-name="P28" loext:marker-style-name="T10"/>
      <text:list text:style-name="WWNum27">
        <text:list-item>
          <text:p text:style-name="P8" loext:marker-style-name="T24"><text:span text:style-name="T1">Click on </text:span><text:span text:style-name="T10">New Item</text:span><text:span text:style-name="T1"> in the Jenkins Dashboard → </text:span><text:span text:style-name="T2">Enter a name for the project, select </text:span><text:span text:style-name="T10">Freestyle project</text:span><text:span text:style-name="T2"> as the build job type, and click on the </text:span><text:span text:style-name="T10">OK </text:span><text:span text:style-name="T2">button as shown in the screenshot below:</text:span></text:p>
        </text:list-item>
      </text:list>
      <text:p text:style-name="P12" loext:marker-style-name="T2"/>
      <text:p text:style-name="P12" loext:marker-style-name="T2"><draw:frame draw:style-name="fr2" draw:name="Image10" text:anchor-type="as-char" svg:width="6.2457in" svg:height="2.9535in" draw:z-index="9"><draw:image xlink:href="Pictures/100000000000076A00000382DD73AAF6.png" xlink:type="simple" xlink:show="embed" xlink:actuate="onLoad" draw:mime-type="image/png"/></draw:frame></text:p>
      <text:p text:style-name="P12" loext:marker-style-name="T2"/>
      <text:list text:continue-numbering="true" text:style-name="WWNum27">
        <text:list-item>
          <text:p text:style-name="P8" loext:marker-style-name="T24"><text:span text:style-name="T2">Click on</text:span><text:span text:style-name="T10"> Source Code Management → </text:span><text:span text:style-name="T2">Select </text:span><text:span text:style-name="T10">Git</text:span><text:span text:style-name="T2"> and enter the </text:span><text:span text:style-name="T10">Repository URL</text:span></text:p>
        </text:list-item>
      </text:list>
      <text:p text:style-name="P16" loext:marker-style-name="T10"/>
      <text:p text:style-name="P5" loext:marker-style-name="T24"><text:span text:style-name="T24"><draw:frame draw:style-name="fr2" draw:name="Image11" text:anchor-type="as-char" svg:width="6.2457in" svg:height="1.7709in" draw:z-index="10"><draw:image xlink:href="Pictures/100000000000070D0000020095EB7DF0.png" xlink:type="simple" xlink:show="embed" xlink:actuate="onLoad" draw:mime-type="image/png"/></draw:frame></text:span><text:span text:style-name="T24"><text:s/></text:span></text:p>
      <text:p text:style-name="P24" loext:marker-style-name="T10"/>
      <text:list text:continue-numbering="true" text:style-name="WWNum27">
        <text:list-item>
          <text:p text:style-name="P8" loext:marker-style-name="T10"><text:span text:style-name="T2">Click on </text:span><text:span text:style-name="T10">Build Triggers</text:span><text:span text:style-name="T2">, select the required option as shown in the screenshot below, and then click on </text:span><text:span text:style-name="T10">Save</text:span></text:p>
        </text:list-item>
      </text:list>
      <text:p text:style-name="P5" loext:marker-style-name="T24"><text:span text:style-name="T10"><draw:frame draw:style-name="fr2" draw:name="Image12" text:anchor-type="as-char" svg:width="6.2457in" svg:height="2.952in" draw:z-index="11"><draw:image xlink:href="Pictures/100000000000077300000386C17E9A2F.png" xlink:type="simple" xlink:show="embed" xlink:actuate="onLoad" draw:mime-type="image/png"/></draw:frame></text:span><text:span text:style-name="T10"><text:s/></text:span></text:p>
      <text:p text:style-name="P10" loext:marker-style-name="T10"><text:soft-page-break/><text:span text:style-name="T10"><text:s/><text:tab/><text:tab/><text:tab/></text:span></text:p>
      <text:list text:continue-numbering="true" text:style-name="WWNum27">
        <text:list-item>
          <text:p text:style-name="P8" loext:marker-style-name="T24"><text:span text:style-name="T1">Click on </text:span><text:span text:style-name="T10">Build Now </text:span><text:span text:style-name="T1">to view the build results</text:span></text:p>
          <text:p text:style-name="P17" loext:marker-style-name="T24"/>
        </text:list-item>
      </text:list>
      <text:p text:style-name="P18" loext:marker-style-name="T24"><draw:frame draw:style-name="fr2" draw:name="Image13" text:anchor-type="as-char" svg:width="6.2457in" svg:height="1.4319in" draw:z-index="12"><draw:image xlink:href="Pictures/100000000000077F000001B881652B1C.png" xlink:type="simple" xlink:show="embed" xlink:actuate="onLoad" draw:mime-type="image/png"/></draw:frame></text:p>
      <text:p text:style-name="P24" loext:marker-style-name="T10"/>
      <text:list text:continue-numbering="true" text:style-name="WWNum27">
        <text:list-item>
          <text:p text:style-name="P9" loext:marker-style-name="T2"><text:span text:style-name="T2">Click on </text:span><text:span text:style-name="T7">Status</text:span><text:span text:style-name="T2"> to view the build logs</text:span></text:p>
        </text:list-item>
      </text:list>
      <text:p text:style-name="P16" loext:marker-style-name="T10"/>
      <text:p text:style-name="P5" loext:marker-style-name="T24"><text:span text:style-name="T24"><text:s/></text:span><draw:frame draw:style-name="fr1" draw:name="Image14" text:anchor-type="char" svg:width="6.2457in" svg:height="2.5882in" draw:z-index="13"><draw:image xlink:href="Pictures/10000000000006230000028BA6393607.png" xlink:type="simple" xlink:show="embed" xlink:actuate="onLoad" draw:mime-type="image/png"/></draw:frame></text:p>
      <text:p text:style-name="P16" loext:marker-style-name="T10"/>
      <text:list text:continue-numbering="true" text:style-name="WWNum27">
        <text:list-header>
          <text:p text:style-name="P8" loext:marker-style-name="T2"><text:span text:style-name="T1"/></text:p>
        </text:list-header>
      </text:list>
      <text:p text:style-name="P16" loext:marker-style-name="T10"/>
      <text:p text:style-name="P5" loext:marker-style-name="T10"/>
      <text:p text:style-name="P16" loext:marker-style-name="T10"/>
      <text:p text:style-name="P5" loext:marker-style-name="T24"><text:span text:style-name="T6"/></text:p>
      <text:p text:style-name="P31" loext:marker-style-name="T25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ListLabel_20_154" style:display-name="ListLabel 154" style:family="text">
      <style:text-properties fo:font-size="12pt" fo:font-weight="normal" style:font-size-asian="12pt" style:font-weight-asian="normal" style:font-size-complex="12pt" style:font-weight-complex="normal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208" style:display-name="ListLabel 208" style:family="text">
      <style:text-properties fo:font-weight="normal" style:font-weight-asian="normal" style:font-weight-complex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163" style:display-name="ListLabel 16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235" style:display-name="ListLabel 235" style:family="text">
      <style:text-properties fo:font-size="12pt" fo:font-weight="normal" style:font-size-asian="12pt" style:font-weight-asian="normal" style:font-size-complex="12pt" style:font-weight-complex="bold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8">
      <text:list-level-style-number text:level="1" text:style-name="ListLabel_20_154" loext:num-list-format="2.%1%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1.%1%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3.%1%" style:num-prefix="3." style:num-format="1">
        <style:list-level-properties text:list-level-position-and-space-mode="label-alignment">
          <style:list-level-label-alignment text:label-followed-by="listtab" fo:text-indent="-0.25in" fo:margin-left="0.4016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016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16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016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16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016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4.%1%" style:num-prefix="4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09:48:22.084552522</meta:creation-date>
    <dc:date>2026-05-17T11:06:33.711564147</dc:date>
    <meta:editing-duration>PT6M53S</meta:editing-duration>
    <meta:editing-cycles>1</meta:editing-cycles>
    <meta:document-statistic meta:table-count="0" meta:image-count="14" meta:object-count="0" meta:page-count="5" meta:paragraph-count="37" meta:word-count="300" meta:character-count="1787" meta:non-whitespace-character-count="1485"/>
    <meta:generator>LibreOffice/24.2.7.2$Linux_X86_64 LibreOffice_project/420$Build-2</meta:generator>
  </office:meta>
</office:document-meta>
</file>