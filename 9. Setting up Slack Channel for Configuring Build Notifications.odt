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E0000025EE21FF65D.png" manifest:media-type="image/png"/>
  <manifest:file-entry manifest:full-path="Pictures/100000000000077B00000368F3D8472C.png" manifest:media-type="image/png"/>
  <manifest:file-entry manifest:full-path="Pictures/100000000000074A000002AA8C864024.png" manifest:media-type="image/png"/>
  <manifest:file-entry manifest:full-path="Pictures/1000000000000523000002A865DA2167.png" manifest:media-type="image/png"/>
  <manifest:file-entry manifest:full-path="Pictures/100000000000020F0000011AE82A5D68.png" manifest:media-type="image/png"/>
  <manifest:file-entry manifest:full-path="Pictures/10000000000003D0000001F6745202C9.png" manifest:media-type="image/png"/>
  <manifest:file-entry manifest:full-path="Pictures/10000000000007800000033D840F146E.png" manifest:media-type="image/png"/>
  <manifest:file-entry manifest:full-path="Pictures/10000000000007740000037F51F46A99.png" manifest:media-type="image/png"/>
  <manifest:file-entry manifest:full-path="Pictures/1000000000000780000003BB062DEB74.png" manifest:media-type="image/png"/>
  <manifest:file-entry manifest:full-path="Pictures/100000000000076A0000038289A26EA2.png" manifest:media-type="image/png"/>
  <manifest:file-entry manifest:full-path="Pictures/10000000000007800000037A658F1BA2.png" manifest:media-type="image/png"/>
  <manifest:file-entry manifest:full-path="Pictures/100000000000026800000306B40BB5FB.png" manifest:media-type="image/png"/>
  <manifest:file-entry manifest:full-path="Pictures/1000000000000324000001BC82504B21.png" manifest:media-type="image/png"/>
  <manifest:file-entry manifest:full-path="Pictures/10000000000002970000025EA460EB5D.png" manifest:media-type="image/png"/>
  <manifest:file-entry manifest:full-path="Pictures/10000000000003F00000031A8BECE784.png" manifest:media-type="image/png"/>
  <manifest:file-entry manifest:full-path="Pictures/100000000000077300000365AE608310.png" manifest:media-type="image/png"/>
  <manifest:file-entry manifest:full-path="Pictures/1000000000000768000003704E30F314.png" manifest:media-type="image/png"/>
  <manifest:file-entry manifest:full-path="Pictures/1000000000000752000002F576B2A0BB.png" manifest:media-type="image/png"/>
  <manifest:file-entry manifest:full-path="Pictures/1000000000000656000003464A7556B9.png" manifest:media-type="image/png"/>
  <manifest:file-entry manifest:full-path="Pictures/10000000000007640000037E63896BED.png" manifest:media-type="image/png"/>
  <manifest:file-entry manifest:full-path="Pictures/10000000000005820000026064895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List_20_Paragraph">
      <style:paragraph-properties fo:line-height="100%" fo:padding="0in" fo:border="none" style:shadow="none" style:join-border="false"/>
      <style:text-properties officeooo:paragraph-rsid="000a13e6"/>
    </style:style>
    <style:style style:name="P3" style:family="paragraph" style:parent-style-name="List_20_Paragraph">
      <style:paragraph-properties fo:margin-left="0.5909in" fo:line-height="100%" fo:padding="0in" fo:border="none" style:shadow="none" style:join-border="false"/>
      <style:text-properties officeooo:paragraph-rsid="000a13e6"/>
    </style:style>
    <style:style style:name="P4" style:family="paragraph" style:parent-style-name="List_20_Paragraph">
      <style:paragraph-properties fo:margin-left="0.6898in" fo:line-height="100%" fo:text-indent="-0.0984in" style:auto-text-indent="false" fo:padding="0in" fo:border="none" style:shadow="none" style:join-border="false"/>
      <style:text-properties officeooo:paragraph-rsid="000a13e6"/>
    </style:style>
    <style:style style:name="P5" style:family="paragraph" style:parent-style-name="List_20_Paragraph">
      <style:paragraph-properties fo:margin-left="0.4016in" fo:line-height="100%" fo:padding="0in" fo:border="none" style:shadow="none" style:join-border="false"/>
      <style:text-properties officeooo:paragraph-rsid="000a13e6"/>
    </style:style>
    <style:style style:name="P6" style:family="paragraph" style:parent-style-name="List_20_Paragraph">
      <style:paragraph-properties fo:margin-left="0.4925in" fo:line-height="100%" fo:text-indent="-0.2953in" style:auto-text-indent="false" fo:padding="0in" fo:border="none" style:shadow="none" style:join-border="false"/>
      <style:text-properties officeooo:paragraph-rsid="000a13e6"/>
    </style:style>
    <style:style style:name="P7" style:family="paragraph" style:parent-style-name="List_20_Paragraph">
      <style:paragraph-properties fo:margin-left="0.5909in" fo:line-height="100%" fo:text-indent="-0.2953in" style:auto-text-indent="false" fo:padding="0in" fo:border="none" style:shadow="none" style:join-border="false"/>
      <style:text-properties officeooo:paragraph-rsid="000a13e6"/>
    </style:style>
    <style:style style:name="P8" style:family="paragraph" style:parent-style-name="List_20_Paragraph">
      <style:paragraph-properties fo:margin-left="0.4925in" fo:line-height="100%" fo:text-indent="-0.0909in" style:auto-text-indent="false" fo:padding="0in" fo:border="none" style:shadow="none" style:join-border="false"/>
      <style:text-properties officeooo:paragraph-rsid="000a13e6"/>
    </style:style>
    <style:style style:name="P9" style:family="paragraph" style:parent-style-name="List_20_Paragraph">
      <style:paragraph-properties fo:margin-left="0.4016in" fo:line-height="100%" fo:text-indent="-0.2043in" style:auto-text-indent="false" fo:padding="0in" fo:border="none" style:shadow="none" style:join-border="false"/>
      <style:text-properties officeooo:paragraph-rsid="000a13e6"/>
    </style:style>
    <style:style style:name="P10" style:family="paragraph" style:parent-style-name="List_20_Paragraph">
      <style:paragraph-properties fo:margin-left="0.6898in" fo:line-height="100%" fo:text-indent="0in" style:auto-text-indent="false" fo:padding="0in" fo:border="none" style:shadow="none" style:join-border="false"/>
      <style:text-properties officeooo:paragraph-rsid="000a13e6"/>
    </style:style>
    <style:style style:name="P11" style:family="paragraph" style:parent-style-name="List_20_Paragraph">
      <style:paragraph-properties fo:margin-left="0.5909in" fo:line-height="100%" fo:text-indent="-0.0984in" style:auto-text-indent="false" fo:padding="0in" fo:border="none" style:shadow="none" style:join-border="false"/>
      <style:text-properties officeooo:paragraph-rsid="000e9064"/>
    </style:style>
    <style:style style:name="P12" style:family="paragraph" style:parent-style-name="List_20_Paragraph">
      <style:paragraph-properties fo:margin-left="0.4925in" fo:line-height="100%" fo:text-indent="-0.3937in" style:auto-text-indent="false" fo:padding="0in" fo:border="none" style:shadow="none" style:join-border="false"/>
      <style:text-properties officeooo:paragraph-rsid="001073ce"/>
    </style:style>
    <style:style style:name="P13" style:family="paragraph" style:parent-style-name="List_20_Paragraph">
      <style:paragraph-properties fo:margin-left="0.4016in" fo:line-height="100%" fo:text-indent="0in" style:auto-text-indent="false" fo:padding="0in" fo:border="none" style:shadow="none" style:join-border="false"/>
      <style:text-properties officeooo:paragraph-rsid="001073ce"/>
    </style:style>
    <style:style style:name="P14" style:family="paragraph" style:parent-style-name="List_20_Paragraph" style:list-style-name="WWNum24">
      <style:paragraph-properties fo:line-height="100%" fo:padding="0in" fo:border="none" style:shadow="none" style:join-border="false"/>
      <style:text-properties officeooo:paragraph-rsid="000a13e6"/>
    </style:style>
    <style:style style:name="P15" style:family="paragraph" style:parent-style-name="List_20_Paragraph" style:list-style-name="WWNum28">
      <style:paragraph-properties fo:margin-left="0.5909in" fo:line-height="100%" fo:text-indent="-0.2953in" style:auto-text-indent="false" fo:padding="0in" fo:border="none" style:shadow="none" style:join-border="false"/>
      <style:text-properties officeooo:paragraph-rsid="000a13e6"/>
    </style:style>
    <style:style style:name="P16" style:family="paragraph" style:parent-style-name="List_20_Paragraph" style:list-style-name="WWNum28">
      <style:paragraph-properties fo:margin-left="0.5909in" fo:line-height="100%" fo:text-indent="0in" style:auto-text-indent="false" fo:padding="0in" fo:border="none" style:shadow="none" style:join-border="false"/>
      <style:text-properties officeooo:paragraph-rsid="000a13e6"/>
    </style:style>
    <style:style style:name="P17" style:family="paragraph" style:parent-style-name="List_20_Paragraph" style:list-style-name="WWNum31">
      <style:paragraph-properties fo:margin-left="0.4925in" fo:line-height="100%" fo:text-indent="-0.302in" style:auto-text-indent="false" fo:padding="0in" fo:border="none" style:shadow="none" style:join-border="false"/>
      <style:text-properties officeooo:paragraph-rsid="000a13e6"/>
    </style:style>
    <style:style style:name="P18" style:family="paragraph" style:parent-style-name="List_20_Paragraph" style:list-style-name="WWNum31">
      <style:paragraph-properties fo:margin-left="0.4016in" fo:line-height="100%" fo:text-indent="-0.2043in" style:auto-text-indent="false" fo:padding="0in" fo:border="none" style:shadow="none" style:join-border="false"/>
      <style:text-properties officeooo:paragraph-rsid="000a13e6"/>
    </style:style>
    <style:style style:name="P19" style:family="paragraph" style:parent-style-name="List_20_Paragraph" style:list-style-name="WWNum31">
      <style:paragraph-properties fo:margin-left="0.4016in" fo:line-height="100%" fo:text-indent="-0.4016in" style:auto-text-indent="false" fo:padding="0in" fo:border="none" style:shadow="none" style:join-border="false"/>
      <style:text-properties officeooo:paragraph-rsid="000a13e6"/>
    </style:style>
    <style:style style:name="P20" style:family="paragraph" style:parent-style-name="List_20_Paragraph" style:list-style-name="WWNum31">
      <style:paragraph-properties fo:margin-left="0.4016in" fo:line-height="100%" fo:text-indent="-0.3028in" style:auto-text-indent="false" fo:padding="0in" fo:border="none" style:shadow="none" style:join-border="false"/>
      <style:text-properties officeooo:paragraph-rsid="000ce6c4"/>
    </style:style>
    <style:style style:name="P21" style:family="paragraph" style:parent-style-name="List_20_Paragraph" style:list-style-name="WWNum31">
      <style:paragraph-properties fo:margin-left="0.4016in" fo:line-height="100%" fo:text-indent="0in" style:auto-text-indent="false" fo:padding="0in" fo:border="none" style:shadow="none" style:join-border="false"/>
      <style:text-properties officeooo:paragraph-rsid="000ce6c4"/>
    </style:style>
    <style:style style:name="P22" style:family="paragraph" style:parent-style-name="List_20_Paragraph" style:list-style-name="WWNum31">
      <style:paragraph-properties fo:margin-left="0.4925in" fo:line-height="100%" fo:text-indent="-0.3937in" style:auto-text-indent="false" fo:padding="0in" fo:border="none" style:shadow="none" style:join-border="false"/>
      <style:text-properties officeooo:paragraph-rsid="001073ce"/>
    </style:style>
    <style:style style:name="P23" style:family="paragraph" style:parent-style-name="List_20_Paragraph" style:list-style-name="WWNum31">
      <style:paragraph-properties fo:margin-left="0.4016in" fo:line-height="100%" fo:text-indent="-0.4016in" style:auto-text-indent="false" fo:padding="0in" fo:border="none" style:shadow="none" style:join-border="false"/>
      <style:text-properties officeooo:paragraph-rsid="001073ce"/>
    </style:style>
    <style:style style:name="P24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5" style:family="paragraph" style:parent-style-name="List_20_Paragraph">
      <style:paragraph-properties fo:margin-left="0.4016in" fo:line-height="100%" fo:padding="0in" fo:border="none" style:shadow="none" style:join-border="false"/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List_20_Paragraph">
      <style:paragraph-properties fo:margin-left="0.5909in" fo:line-height="100%" fo:padding="0in" fo:border="none" style:shadow="none" style:join-border="false"/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7" style:family="paragraph" style:parent-style-name="List_20_Paragraph"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8" style:family="paragraph" style:parent-style-name="List_20_Paragraph">
      <style:paragraph-properties fo:margin-left="0.4925in" fo:line-height="100%" fo:padding="0in" fo:border="none" style:shadow="none" style:join-border="false"/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29" style:family="paragraph" style:parent-style-name="List_20_Paragraph">
      <style:paragraph-properties fo:margin-left="0.5909in" fo:line-height="100%" fo:padding="0in" fo:border="none" style:shadow="none" style:join-border="false"/>
      <style:text-properties fo:color="#404040" loext:opacity="100%" style:font-name="Calibri" fo:font-size="12pt" fo:font-weight="bold" officeooo:paragraph-rsid="000a13e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List_20_Paragraph" style:list-style-name="WWNum28">
      <style:paragraph-properties fo:margin-left="0.5909in" fo:line-height="100%" fo:text-indent="-0.2953in" style:auto-text-indent="false" fo:padding="0in" fo:border="none" style:shadow="none" style:join-border="false"/>
      <style:text-properties fo:color="#404040" loext:opacity="100%" style:font-name="Calibri" officeooo:paragraph-rsid="000a13e6" style:font-size-asian="12pt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31" style:family="paragraph" style:parent-style-name="List_20_Paragraph">
      <style:paragraph-properties fo:margin-left="0.6898in" fo:text-indent="-0.0909in" style:auto-text-indent="false"/>
      <style:text-properties officeooo:paragraph-rsid="000a13e6"/>
    </style:style>
    <style:style style:name="P32" style:family="paragraph" style:parent-style-name="List_20_Paragraph">
      <style:text-properties officeooo:paragraph-rsid="000a13e6"/>
    </style:style>
    <style:style style:name="P33" style:family="paragraph" style:parent-style-name="Standard">
      <style:paragraph-properties fo:text-align="center" style:justify-single-word="false"/>
      <style:text-properties officeooo:paragraph-rsid="000a13e6"/>
    </style:style>
    <style:style style:name="P34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0a13e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5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a13e6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6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a13e6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7" style:family="paragraph" style:parent-style-name="Standard">
      <style:paragraph-properties fo:margin-left="-0.0984in" fo:line-height="100%" fo:padding="0in" fo:border="none" style:shadow="none" style:join-border="false"/>
      <style:text-properties officeooo:paragraph-rsid="000a13e6"/>
    </style:style>
    <style:style style:name="P38" style:family="paragraph">
      <loext:graphic-properties draw:fill="solid" draw:fill-color="#ffffff"/>
      <style:paragraph-properties fo:text-align="start"/>
      <style:text-properties fo:color="#ffffff" loext:opacity="100%" fo:font-size="18pt"/>
    </style:style>
    <style:style style:name="T1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officeooo:rsid="001073ce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style:font-name-asian="Calibri1" style:font-size-asian="12pt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404040" loext:opacity="100%" fo:font-size="5pt" fo:language="en" fo:country="US" fo:font-weight="bold" style:font-size-asian="5pt" style:font-weight-asian="bold" style:font-size-complex="5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style:vertical-pos="from-top" style:horizontal-pos="center" style:horizontal-rel="paragraph" style:mirror="none" fo:clip="rect(0.5547in, 0in, 2.49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3.4374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ffffff" svg:stroke-linecap="butt" draw:fill="solid" draw:fill-color="#ffffff" draw:textarea-vertical-align="middle" draw:auto-grow-height="false" fo:min-height="0.002in" fo:min-width="0.0126in" fo:padding-top="0.05in" fo:padding-bottom="0.05in" fo:padding-left="0.1in" fo:padding-right="0.1in" fo:wrap-option="wrap" draw:shadow="visible" draw:shadow-offset-x="0in" draw:shadow-offset-y="0.0252in" draw:shadow-color="#000000" draw:shadow-opacity="35%" loext:shadow-blur="0.0437in" loext:decorative="false" fo:margin-left="0.0626in" fo:margin-right="0.0799in" fo:margin-top="0.0209in" fo:margin-bottom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1"><text:span text:style-name="T1">Setting up Slack Channel for Configuring Build Notifications</text:span></text:p>
      <text:p text:style-name="P33" loext:marker-style-name="T1"><text:span text:style-name="T1"/></text:p>
      <text:p text:style-name="P37" loext:marker-style-name="T4"><text:span text:style-name="T3">Step 1:</text:span><text:span text:style-name="T4"> Log in to the Jenkins CI tool and create a freestyle job</text:span></text:p>
      <text:p text:style-name="P34" loext:marker-style-name="T10"/>
      <text:list text:style-name="WWNum24">
        <text:list-item>
          <text:p text:style-name="P14" loext:marker-style-name="T9"><text:span text:style-name="T5">Open the browser, go to the Jenkins </text:span><text:span text:style-name="T9">Dashboard</text:span><text:span text:style-name="T5"> by typing </text:span><text:span text:style-name="T9">localhost:8080</text:span><text:span text:style-name="T5"> in your browser, provide the credentials, and click the </text:span><text:span text:style-name="T9">Sign in </text:span><text:span text:style-name="T5">button</text:span></text:p>
          <text:p text:style-name="P14" loext:marker-style-name="T5"><text:span text:style-name="T5">Click on </text:span><text:span text:style-name="T7">the </text:span><text:span text:style-name="T9">New Item </text:span><text:span text:style-name="T5">option as shown in the screenshot below:</text:span></text:p>
        </text:list-item>
      </text:list>
      <text:p text:style-name="P2" loext:marker-style-name="T5"><text:span text:style-name="T5"><text:s/>Enter a desired name for the project, select</text:span><text:span text:style-name="T9"> Freestyle project</text:span><text:span text:style-name="T5">, and then click on </text:span><text:span text:style-name="T9">OK</text:span><text:span text:style-name="T5"> as shown in the screenshot below:</text:span></text:p>
      <text:p text:style-name="P24" loext:marker-style-name="T5"/>
      <text:p text:style-name="P24" loext:marker-style-name="T5"><draw:frame draw:style-name="fr3" draw:name="Image1" text:anchor-type="as-char" svg:width="6.1929in" svg:height="2.9035in" draw:z-index="2"><draw:image xlink:href="Pictures/10000000000007740000037F51F46A99.png" xlink:type="simple" xlink:show="embed" xlink:actuate="onLoad" draw:mime-type="image/png"/></draw:frame></text:p>
      <text:p text:style-name="P24" loext:marker-style-name="T5"/>
      <text:list text:continue-numbering="true" text:style-name="WWNum24">
        <text:list-item>
          <text:p text:style-name="P14" loext:marker-style-name="T5"><text:span text:style-name="T5">Click on </text:span><text:span text:style-name="T9">Save </text:span><text:span text:style-name="T5">button as shown in the screenshot below:</text:span></text:p>
        </text:list-item>
      </text:list>
      <text:p text:style-name="P24" loext:marker-style-name="T5"><draw:frame draw:style-name="fr3" draw:name="Image2" text:anchor-type="as-char" svg:width="6.1929in" svg:height="2.9283in" draw:z-index="3"><draw:image xlink:href="Pictures/100000000000076A0000038289A26EA2.png" xlink:type="simple" xlink:show="embed" xlink:actuate="onLoad" draw:mime-type="image/png"/></draw:frame></text:p>
      <text:p text:style-name="P2" loext:marker-style-name="T5"><text:span text:style-name="T5"><text:s/></text:span></text:p>
      <text:p text:style-name="P36" loext:marker-style-name="T5"/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list text:continue-numbering="true" text:style-name="WWNum24">
        <text:list-item>
          <text:p text:style-name="P14" loext:marker-style-name="T5"><text:soft-page-break/><text:span text:style-name="T5">Click on </text:span><text:span text:style-name="T9">Manage Jenkins </text:span><text:span text:style-name="T5">as shown in the screenshot below:</text:span></text:p>
          <text:p text:style-name="P14" loext:marker-style-name="T5"><text:span text:style-name="T5">Click on </text:span><text:span text:style-name="T9">Plugins</text:span><text:span text:style-name="T5"> as shown in the screenshot below:</text:span></text:p>
          <text:p text:style-name="P14" loext:marker-style-name="T5"><text:span text:style-name="T5">Click on </text:span><text:span text:style-name="T9">Installed plugins</text:span><text:span text:style-name="T5"> to verify whether the </text:span><text:span text:style-name="T9">Slack Notification Plugin</text:span><text:span text:style-name="T5"> has been installed <text:s/></text:span></text:p>
        </text:list-item>
      </text:list>
      <text:p text:style-name="P2" loext:marker-style-name="T5"><text:span text:style-name="T5"><draw:frame draw:style-name="fr3" draw:name="Image3" text:anchor-type="as-char" svg:width="6.1929in" svg:height="3.0791in" draw:z-index="4"><draw:image xlink:href="Pictures/1000000000000780000003BB062DEB74.png" xlink:type="simple" xlink:show="embed" xlink:actuate="onLoad" draw:mime-type="image/png"/></draw:frame></text:span><text:span text:style-name="T5"><text:s/></text:span></text:p>
      <text:p text:style-name="P2" loext:marker-style-name="T5"><text:span text:style-name="T1"/></text:p>
      <text:p text:style-name="P37" loext:marker-style-name="T4"><text:bookmark-start text:name="_Hlk164156460"/><text:span text:style-name="T3">Step 2:</text:span><text:span text:style-name="T4"> Set up Slack channel</text:span><text:bookmark-end text:name="_Hlk164156460"/></text:p>
      <text:p text:style-name="P34" loext:marker-style-name="T10"/>
      <text:list text:style-name="WWNum28">
        <text:list-item>
          <text:p text:style-name="P30" loext:marker-style-name="T12">Open the browser, go to Slack, enter a desired name of your company or team, and <text:line-break/> <text:s/>then click on Next: <text:s/></text:p>
          <text:p text:style-name="P16" loext:marker-style-name="T12"><text:span text:style-name="T7">Enter a desired name for your profile and then click on </text:span><text:span text:style-name="T10">Next</text:span><text:span text:style-name="T7"> </text:span><text:span text:style-name="T12">:</text:span></text:p>
        </text:list-item>
      </text:list>
      <text:p text:style-name="P3"><text:span text:style-name="T14"><text:s/></text:span><text:span text:style-name="T7">Click on </text:span><text:span text:style-name="T10">Skip this step</text:span><text:span text:style-name="T7">:</text:span></text:p>
      <text:p text:style-name="P3" loext:marker-style-name="T4"><text:span text:style-name="T7">Enter a desired channel name and then click on </text:span><text:span text:style-name="T10">Next</text:span><text:span text:style-name="T7">: </text:span></text:p>
      <text:p text:style-name="P3" loext:marker-style-name="T10"><text:span text:style-name="T10"><text:s/></text:span><text:span text:style-name="T7">Click on </text:span><text:span text:style-name="T10">Start with Free</text:span><text:span text:style-name="T7">:</text:span></text:p>
      <text:p text:style-name="P3" loext:marker-style-name="T4"><text:span text:style-name="T7">Click on the channel name that you have created:</text:span></text:p>
      <text:p text:style-name="P3" loext:marker-style-name="T7"><text:span text:style-name="T7"><text:s text:c="2"/></text:span></text:p>
      <text:p text:style-name="P3" loext:marker-style-name="T4"><draw:custom-shape text:anchor-type="char" draw:z-index="0" draw:name="Rectangle 41" draw:style-name="gr1" draw:text-style-name="P38" svg:width="0.2122in" svg:height="0.1016in" svg:x="2.8547in" svg:y="1.1583in"><text:p text:style-name="P1" loext:marker-style-name="T16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<draw:frame draw:style-name="fr3" draw:name="Image4" text:anchor-type="as-char" svg:width="6.102in" svg:height="2.8264in" draw:z-index="5"><draw:image xlink:href="Pictures/10000000000007800000037A658F1BA2.png" xlink:type="simple" xlink:show="embed" xlink:actuate="onLoad" draw:mime-type="image/png"/></draw:frame></text:span><text:span text:style-name="T4"><text:s/></text:span></text:p>
      <text:p text:style-name="P35" loext:marker-style-name="T10"/>
      <text:p text:style-name="P7" loext:marker-style-name="T7"><text:span text:style-name="T7"/></text:p>
      <text:p text:style-name="P7" loext:marker-style-name="T7"><text:span text:style-name="T7"/></text:p>
      <text:p text:style-name="P7" loext:marker-style-name="T7"><text:span text:style-name="T7"/></text:p>
      <text:p text:style-name="P7" loext:marker-style-name="T7"><text:span text:style-name="T7"/></text:p>
      <text:list text:continue-numbering="true" text:style-name="WWNum28">
        <text:list-item>
          <text:p text:style-name="P15" loext:marker-style-name="T7"><text:soft-page-break/><text:span text:style-name="T7">Click on </text:span><text:span text:style-name="T10">Integrations</text:span><text:span text:style-name="T7"> as shown in the screenshot below:</text:span></text:p>
        </text:list-item>
      </text:list>
      <text:p text:style-name="P3" loext:marker-style-name="T7"><text:span text:style-name="T7"><text:s/></text:span></text:p>
      <text:p text:style-name="P3" loext:marker-style-name="T4"><text:span text:style-name="T4"><draw:frame draw:style-name="fr4" draw:name="Image5" text:anchor-type="as-char" svg:width="6.102in" svg:height="4.3972in" draw:z-index="6"><draw:image xlink:href="Pictures/100000000000026800000306B40BB5FB.png" xlink:type="simple" xlink:show="embed" xlink:actuate="onLoad" draw:mime-type="image/png"/></draw:frame></text:span><text:span text:style-name="T4"><text:s/></text:span></text:p>
      <text:p text:style-name="P29" loext:marker-style-name="T10"/>
      <text:list text:continue-numbering="true" text:style-name="WWNum28">
        <text:list-item>
          <text:p text:style-name="P15" loext:marker-style-name="T7"><text:span text:style-name="T7">Click on </text:span><text:span text:style-name="T10">Add an App</text:span><text:span text:style-name="T7"> as shown in the screenshot below: </text:span></text:p>
        </text:list-item>
      </text:list>
      <text:p text:style-name="P3" loext:marker-style-name="T7"><text:span text:style-name="T4"/></text:p>
      <text:p text:style-name="P29" loext:marker-style-name="T10"><draw:frame draw:style-name="fr3" draw:name="Image6" text:anchor-type="as-char" svg:width="6.5311in" svg:height="4.1925in" draw:z-index="7"><draw:image xlink:href="Pictures/10000000000002970000025EA460EB5D.png" xlink:type="simple" xlink:show="embed" xlink:actuate="onLoad" draw:mime-type="image/png"/></draw:frame></text:p>
      <text:p text:style-name="P29" loext:marker-style-name="T10"/>
      <text:list text:continue-numbering="true" text:style-name="WWNum28">
        <text:list-header>
          <text:p text:style-name="P15" loext:marker-style-name="T7"><text:span text:style-name="T7"/></text:p>
        </text:list-header>
        <text:list-item>
          <text:p text:style-name="P15" loext:marker-style-name="T7"><text:soft-page-break/><text:span text:style-name="T7">Search for Jenkins and then click on </text:span><text:span text:style-name="T10">Install</text:span><text:span text:style-name="T7"> as shown in the screenshot below:</text:span></text:p>
        </text:list-item>
      </text:list>
      <text:p text:style-name="P3" loext:marker-style-name="T4"><text:span text:style-name="T13">Click on Add to Slack as shown in the screenshot below</text:span></text:p>
      <text:p text:style-name="P3" loext:marker-style-name="T4"><text:span text:style-name="T7">Click on the </text:span><text:span text:style-name="T10">Choose a channel…</text:span><text:span text:style-name="T7"> drop-down, select the channel that you have created, <text:line-break/> and then click on</text:span><text:span text:style-name="T10"> Add Jenkins CI integration </text:span><text:span text:style-name="T7">as shown in the screenshot below:</text:span></text:p>
      <text:p text:style-name="P28" loext:marker-style-name="T7"/>
      <text:p text:style-name="P4" loext:marker-style-name="T4"><draw:frame draw:style-name="fr3" draw:name="Image7" text:anchor-type="as-char" svg:width="6.102in" svg:height="3.3693in" draw:z-index="8"><draw:image xlink:href="Pictures/1000000000000324000001BC82504B21.png" xlink:type="simple" xlink:show="embed" xlink:actuate="onLoad" draw:mime-type="image/png"/></draw:frame></text:p>
      <text:p text:style-name="P4" loext:marker-style-name="T4"/>
      <text:p text:style-name="P4" loext:marker-style-name="T4"><draw:frame draw:style-name="fr3" draw:name="Image11" text:anchor-type="as-char" svg:width="6.102in" svg:height="2.4646in" draw:z-index="12"><draw:image xlink:href="Pictures/1000000000000752000002F576B2A0BB.png" xlink:type="simple" xlink:show="embed" xlink:actuate="onLoad" draw:mime-type="image/png"/></draw:frame></text:p>
      <text:p text:style-name="P4" loext:marker-style-name="T4"/>
      <text:p text:style-name="P4" loext:marker-style-name="T4"><text:soft-page-break/><draw:frame draw:style-name="fr3" draw:name="Image12" text:anchor-type="as-char" svg:width="6.102in" svg:height="3.152in" draw:z-index="13"><draw:image xlink:href="Pictures/1000000000000656000003464A7556B9.png" xlink:type="simple" xlink:show="embed" xlink:actuate="onLoad" draw:mime-type="image/png"/></draw:frame></text:p>
      <text:p text:style-name="P4" loext:marker-style-name="T4"/>
      <text:p text:style-name="P4" loext:marker-style-name="T4"><draw:frame draw:style-name="fr3" draw:name="Image13" text:anchor-type="as-char" svg:width="6.102in" svg:height="2.6307in" draw:z-index="14"><draw:image xlink:href="Pictures/10000000000005820000026064895CF7.png" xlink:type="simple" xlink:show="embed" xlink:actuate="onLoad" draw:mime-type="image/png"/></draw:frame></text:p>
      <text:p text:style-name="P4" loext:marker-style-name="T4"/>
      <text:p text:style-name="P4" loext:marker-style-name="T4"/>
      <text:p text:style-name="P10" loext:marker-style-name="T4"><draw:frame draw:style-name="fr1" draw:name="Image14" text:anchor-type="as-char" svg:y="-2.4535in" svg:width="6.0571in" svg:height="2.9283in" draw:z-index="16"><draw:image xlink:href="Pictures/10000000000003F00000031A8BECE784.png" xlink:type="simple" xlink:show="embed" xlink:actuate="onLoad" draw:mime-type="image/png"/></draw:frame></text:p>
      <text:p text:style-name="P32" loext:marker-style-name="T10"><text:span text:style-name="T7"/></text:p>
      <text:p text:style-name="P32" loext:marker-style-name="T10"><text:span text:style-name="T7"/></text:p>
      <text:p text:style-name="P32" loext:marker-style-name="T10"><text:span text:style-name="T7"/></text:p>
      <text:p text:style-name="P37" loext:marker-style-name="T4"><text:soft-page-break/><text:span text:style-name="T3">Step 3:</text:span><text:span text:style-name="T4"> Configure Slack in Jenkins</text:span></text:p>
      <text:p text:style-name="P24" loext:marker-style-name="T5"/>
      <text:list text:style-name="WWNum31">
        <text:list-item>
          <text:p text:style-name="P17" loext:marker-style-name="T5"><text:span text:style-name="T5"><text:s/>Navigate into your Jenkins </text:span><text:span text:style-name="T9">Dashboard </text:span><text:span text:style-name="T5">and click on the Freestyle job that you have created as shown in the screenshot below:<text:line-break/>Click on </text:span><text:span text:style-name="T9">Configure</text:span><text:span text:style-name="T5"> as shown in the screenshot below:<text:line-break/> Click on </text:span><text:span text:style-name="T9">Post-build Actions</text:span><text:span text:style-name="T5"> as shown in the screenshot below:</text:span></text:p>
          <text:p text:style-name="P20" loext:marker-style-name="T5"><text:span text:style-name="T5"><draw:frame draw:style-name="fr3" draw:name="Image8" text:anchor-type="as-char" svg:width="6.5945in" svg:height="3.1134in" draw:z-index="9"><draw:image xlink:href="Pictures/10000000000007640000037E63896BED.png" xlink:type="simple" xlink:show="embed" xlink:actuate="onLoad" draw:mime-type="image/png"/></draw:frame></text:span><text:span text:style-name="T5"><text:s/></text:span></text:p>
          <text:p text:style-name="P21" loext:marker-style-name="T5"><text:span text:style-name="T5"/></text:p>
          <text:p text:style-name="P20" loext:marker-style-name="T5"><text:span text:style-name="T5"/></text:p>
        </text:list-item>
        <text:list-item>
          <text:p text:style-name="P20" loext:marker-style-name="T5"><text:span text:style-name="T5">Click on </text:span><text:span text:style-name="T9">Add post-build action </text:span><text:span text:style-name="T5">drop-down and select </text:span><text:span text:style-name="T9">Slack Notifications</text:span><text:span text:style-name="T5"> as shown in the screenshot below:<text:line-break/> <text:s/>Select the desired notifications and then click on </text:span><text:span text:style-name="T9">Save</text:span><text:span text:style-name="T5"> as shown in the screenshot below:<text:line-break/> </text:span></text:p>
        </text:list-item>
      </text:list>
      <text:p text:style-name="P25" loext:marker-style-name="T5"><draw:frame draw:style-name="fr3" draw:name="Image9" text:anchor-type="as-char" svg:width="6.2917in" svg:height="2.8681in" draw:z-index="10"><draw:image xlink:href="Pictures/100000000000077300000365AE608310.png" xlink:type="simple" xlink:show="embed" xlink:actuate="onLoad" draw:mime-type="image/png"/></draw:frame></text:p>
      <text:p text:style-name="P25" loext:marker-style-name="T5"/>
      <text:p text:style-name="P25" loext:marker-style-name="T5"><text:soft-page-break/><draw:frame draw:style-name="fr3" draw:name="Image10" text:anchor-type="as-char" svg:width="6.2917in" svg:height="2.7173in" draw:z-index="11"><draw:image xlink:href="Pictures/10000000000007800000033D840F146E.png" xlink:type="simple" xlink:show="embed" xlink:actuate="onLoad" draw:mime-type="image/png"/></draw:frame></text:p>
      <text:p text:style-name="P25" loext:marker-style-name="T5"/>
      <text:list text:continue-numbering="true" text:style-name="WWNum31">
        <text:list-item>
          <text:p text:style-name="P18" loext:marker-style-name="T5"><text:span text:style-name="T5"><text:s/>Click on </text:span><text:span text:style-name="T9">Manage Jenkins</text:span><text:span text:style-name="T5"> as shown in the screenshot below:<text:line-break/>Click on </text:span><text:span text:style-name="T9">System</text:span><text:span text:style-name="T5"> as shown in the screenshot below:<text:line-break/></text:span><text:span text:style-name="T15">Scroll down to the bottom of the screen; under the Slack section, enter your workspace name, which is the Subdomain name, as shown in the screenshot below:<text:line-break/></text:span><text:span text:style-name="T5">Click on </text:span><text:span text:style-name="T9">Add</text:span><text:span text:style-name="T5"> as shown in the screenshot below:</text:span></text:p>
        </text:list-item>
      </text:list>
      <text:p text:style-name="P9" loext:marker-style-name="T5"><text:span text:style-name="T5"/></text:p>
      <text:p text:style-name="P9" loext:marker-style-name="T5"><text:span text:style-name="T5"><draw:frame draw:style-name="fr3" draw:name="Image17" text:anchor-type="as-char" svg:width="6.4957in" svg:height="3.3409in" draw:z-index="18"><draw:image xlink:href="Pictures/10000000000003D0000001F6745202C9.png" xlink:type="simple" xlink:show="embed" xlink:actuate="onLoad" draw:mime-type="image/png"/></draw:frame></text:span></text:p>
      <text:p text:style-name="P9" loext:marker-style-name="T5"><text:span text:style-name="T5"/></text:p>
      <text:p text:style-name="P8" loext:marker-style-name="T5"><text:soft-page-break/><text:span text:style-name="T5"><draw:frame draw:style-name="fr3" draw:name="Image15" text:anchor-type="as-char" svg:width="6.2917in" svg:height="2.4972in" draw:z-index="15"><draw:image xlink:href="Pictures/1000000000000768000003704E30F314.png" xlink:type="simple" xlink:show="embed" xlink:actuate="onLoad" draw:mime-type="image/png"/></draw:frame></text:span><text:span text:style-name="T5"><text:line-break/></text:span></text:p>
      <text:p text:style-name="P25" loext:marker-style-name="T5"/>
      <text:list text:continue-numbering="true" text:style-name="WWNum31">
        <text:list-item>
          <text:p text:style-name="P18" loext:marker-style-name="T5"><text:span text:style-name="T5"><text:s/>Click on </text:span><text:span text:style-name="T9">Jenkins </text:span><text:span text:style-name="T5">as shown in the screenshot below:</text:span></text:p>
        </text:list-item>
      </text:list>
      <text:p text:style-name="P26" loext:marker-style-name="T5"/>
      <text:p text:style-name="P31" loext:marker-style-name="T5"><draw:frame draw:style-name="fr3" draw:name="Image16" text:anchor-type="as-char" svg:width="5.489in" svg:height="2.9366in" draw:z-index="17"><draw:image xlink:href="Pictures/100000000000020F0000011AE82A5D68.png" xlink:type="simple" xlink:show="embed" xlink:actuate="onLoad" draw:mime-type="image/png"/></draw:frame></text:p>
      <text:p text:style-name="P27" loext:marker-style-name="T5"/>
      <text:list text:continue-numbering="true" text:style-name="WWNum31">
        <text:list-item>
          <text:p text:style-name="P18" loext:marker-style-name="T5"><text:span text:style-name="T5"><text:s/>Choose </text:span><text:span text:style-name="T9">Secret text</text:span><text:span text:style-name="T5"> under </text:span><text:span text:style-name="T9">Kind</text:span><text:span text:style-name="T5"> section as shown in the screenshot below:</text:span></text:p>
        </text:list-item>
      </text:list>
      <text:p text:style-name="P11" loext:marker-style-name="T5"><text:span text:style-name="T5">Enter the </text:span><text:span text:style-name="T7">token credential</text:span><text:span text:style-name="T5"> under </text:span><text:span text:style-name="T9">Secret</text:span><text:span text:style-name="T5"> section as shown in the screenshot below:</text:span></text:p>
      <text:p text:style-name="P11" loext:marker-style-name="T5"><text:span text:style-name="T5">Enter a desired name for </text:span><text:span text:style-name="T9">Description</text:span><text:span text:style-name="T5"> and then click on </text:span><text:span text:style-name="T9">Add </text:span><text:span text:style-name="T5">as shown in the screenshot <text:line-break/>below: <text:line-break/></text:span></text:p>
      <text:p text:style-name="P25" loext:marker-style-name="T5"><text:soft-page-break/><draw:frame draw:style-name="fr3" draw:name="Image18" text:anchor-type="as-char" svg:width="6.2008in" svg:height="3.2063in" draw:z-index="19"><draw:image xlink:href="Pictures/1000000000000523000002A865DA2167.png" xlink:type="simple" xlink:show="embed" xlink:actuate="onLoad" draw:mime-type="image/png"/></draw:frame></text:p>
      <text:p text:style-name="P5" loext:marker-style-name="T5"/>
      <text:p text:style-name="P12" loext:marker-style-name="T5"><text:span text:style-name="T5"/></text:p>
      <text:list text:continue-numbering="true" text:style-name="WWNum31">
        <text:list-item>
          <text:p text:style-name="P22" loext:marker-style-name="T5"><text:span text:style-name="T5">Choose the credential name from the list </text:span><text:span text:style-name="T7">that you have created</text:span><text:span text:style-name="T5"> as shown in the screenshot below:</text:span></text:p>
          <text:p text:style-name="P19" loext:marker-style-name="T5"><text:span text:style-name="T5"><text:s/>Enter the name of the channel </text:span><text:span text:style-name="T7">that you </text:span><text:span text:style-name="T5">have </text:span><text:span text:style-name="T7">created</text:span><text:span text:style-name="T5"> and then click on </text:span><text:span text:style-name="T9">Apply</text:span><text:span text:style-name="T5"> as shown in the screenshot below:</text:span></text:p>
          <text:p text:style-name="P19" loext:marker-style-name="T5"><text:span text:style-name="T5">Click on </text:span><text:span text:style-name="T9">Test Connection</text:span><text:span text:style-name="T5"> to verify that the status shows </text:span><text:span text:style-name="T9">Success</text:span><text:span text:style-name="T5">,</text:span><text:span text:style-name="T9"> </text:span><text:span text:style-name="T5">and then click on</text:span><text:span text:style-name="T9"> Save</text:span><text:span text:style-name="T5"> as shown in the screenshot below: <text:line-break/></text:span></text:p>
        </text:list-item>
      </text:list>
      <text:p text:style-name="P27" loext:marker-style-name="T5"><draw:frame draw:style-name="fr2" draw:name="Image19" text:anchor-type="as-char" svg:width="6.6929in" svg:height="2.4457in" draw:z-index="20"><draw:image xlink:href="Pictures/100000000000074A000002AA8C864024.png" xlink:type="simple" xlink:show="embed" xlink:actuate="onLoad" draw:mime-type="image/png"/></draw:frame></text:p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list text:continue-numbering="true" text:style-name="WWNum31">
        <text:list-item>
          <text:p text:style-name="P23" loext:marker-style-name="T5"><text:soft-page-break/><text:span text:style-name="T5"><text:s/></text:span><text:span text:style-name="T6">Come to Jenkins dashboard Click on job and Build the job</text:span><text:span text:style-name="T5"> <text:s/></text:span></text:p>
          <text:p text:style-name="P23" loext:marker-style-name="T5"><text:span text:style-name="T5"><draw:frame draw:style-name="fr2" draw:name="Image20" text:anchor-type="as-char" svg:width="6.6929in" svg:height="2.1126in" draw:z-index="21"><draw:image xlink:href="Pictures/100000000000077E0000025EE21FF65D.png" xlink:type="simple" xlink:show="embed" xlink:actuate="onLoad" draw:mime-type="image/png"/></draw:frame></text:span></text:p>
        </text:list-item>
      </text:list>
      <text:p text:style-name="P13" loext:marker-style-name="T5"><text:span text:style-name="T5"/></text:p>
      <text:list text:continue-numbering="true" text:style-name="WWNum31">
        <text:list-item>
          <text:p text:style-name="P23" loext:marker-style-name="T5"><text:span text:style-name="T5">Navigate to the slack channel that you have created and check the notification of Jenkins as shown in the screenshot below: </text:span></text:p>
          <text:p text:style-name="P23" loext:marker-style-name="T5"><text:span text:style-name="T5"/></text:p>
          <text:p text:style-name="P23" loext:marker-style-name="T5"><text:span text:style-name="T5"><draw:frame draw:style-name="fr2" draw:name="Image21" text:anchor-type="as-char" svg:width="6.6929in" svg:height="3.048in" draw:z-index="22"><draw:image xlink:href="Pictures/100000000000077B00000368F3D8472C.png" xlink:type="simple" xlink:show="embed" xlink:actuate="onLoad" draw:mime-type="image/png"/></draw:frame></text:span></text:p>
        </text:list-item>
      </text:list>
      <text:p text:style-name="P25" loext:marker-style-name="T5"/>
      <text:list text:continue-numbering="true" text:style-name="WWNum31">
        <text:list-header>
          <text:p text:style-name="P19" loext:marker-style-name="T7"><text:span text:style-name="T7"/></text:p>
        </text:list-header>
      </text:list>
      <text:p text:style-name="P36" loext:marker-style-name="T5"/>
      <text:p text:style-name="P5" loext:marker-style-name="T5"/>
      <text:p text:style-name="P5" loext:marker-style-name="T5"><text:span text:style-name="T5"><text:line-break/></text:span></text:p>
      <text:p text:style-name="P6" loext:marker-style-name="T5"><text:span text:style-name="T15"/></text:p>
      <text:p text:style-name="P6" loext:marker-style-name="T5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.111in" style:contextual-spacing="false" fo:line-height="10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language-complex="hi" style:country-complex="IN"/>
    </style:style>
    <style:style style:name="ListLabel_20_208" style:display-name="ListLabel 208" style:family="text">
      <style:text-properties fo:font-weight="normal" style:font-weight-asian="normal" style:font-weight-complex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44" style:display-name="ListLabel 244" style:family="text">
      <style:text-properties fo:color="#404040" loext:opacity="100%" style:font-name="Calibri" fo:font-family="Calibri" style:font-family-generic="roman" style:font-pitch="variable" fo:font-size="12pt" fo:font-weight="normal" style:font-size-asian="12pt" style:font-weight-asian="normal" style:font-name-complex="Calibri1" style:font-family-complex="Calibri" style:font-family-generic-complex="system" style:font-pitch-complex="variable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71" style:display-name="ListLabel 271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4">
      <text:list-level-style-number text:level="1" text:style-name="ListLabel_20_208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2.%1%" style:num-prefix="2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3.%1%" style:num-prefix="3." style:num-format="1">
        <style:list-level-properties text:list-level-position-and-space-mode="label-alignment">
          <style:list-level-label-alignment text:label-followed-by="space" fo:text-indent="-0.25in" fo:margin-left="0.4016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0:06:37.873663075</meta:creation-date>
    <dc:date>2026-05-27T11:24:15.332506312</dc:date>
    <meta:editing-duration>PT10M21S</meta:editing-duration>
    <meta:editing-cycles>1</meta:editing-cycles>
    <meta:document-statistic meta:table-count="0" meta:image-count="21" meta:object-count="0" meta:page-count="10" meta:paragraph-count="59" meta:word-count="554" meta:character-count="3111" meta:non-whitespace-character-count="2565"/>
    <meta:generator>LibreOffice/24.2.7.2$Linux_X86_64 LibreOffice_project/420$Build-2</meta:generator>
  </office:meta>
</office:document-meta>
</file>